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700000293F276BEEB6F29E55B.png" manifest:media-type="image/png"/>
  <manifest:file-entry manifest:full-path="Pictures/100002010000037800000258DC4E20A2E0C709C8.png" manifest:media-type="image/png"/>
  <manifest:file-entry manifest:full-path="Pictures/10000201000003C00000041077B866F6310B7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 style:list-style-name="L37">
      <style:paragraph-properties fo:margin-top="0cm" fo:margin-bottom="0.499cm" loext:contextual-spacing="false"/>
    </style:style>
    <style:style style:name="P3" style:family="paragraph" style:parent-style-name="Preformatted_20_Text" style:list-style-name="L40">
      <style:paragraph-properties fo:margin-top="0cm" fo:margin-bottom="0.499cm" loext:contextual-spacing="false"/>
    </style:style>
    <style:style style:name="P4" style:family="paragraph" style:parent-style-name="Standard">
      <style:text-properties officeooo:paragraph-rsid="000333c4"/>
    </style:style>
    <style:style style:name="P5" style:family="paragraph" style:parent-style-name="Text_20_body" style:list-style-name="L1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>
      <style:text-properties fo:font-style="italic"/>
    </style:style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>
      <style:text-properties fo:font-weight="bold"/>
    </style:style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5"/>
    <style:style style:name="P47" style:family="paragraph" style:parent-style-name="Text_20_body" style:list-style-name="L47"/>
    <style:style style:name="P48" style:family="paragraph" style:parent-style-name="Text_20_body" style:list-style-name="L49"/>
    <style:style style:name="P49" style:family="paragraph" style:parent-style-name="Text_20_body" style:list-style-name="L50"/>
    <style:style style:name="P50" style:family="paragraph" style:parent-style-name="Text_20_body" style:list-style-name="L51"/>
    <style:style style:name="P51" style:family="paragraph" style:parent-style-name="Text_20_body" style:list-style-name="L52"/>
    <style:style style:name="P52" style:family="paragraph" style:parent-style-name="Text_20_body" style:list-style-name="L53"/>
    <style:style style:name="P53" style:family="paragraph" style:parent-style-name="Text_20_body" style:list-style-name="L55"/>
    <style:style style:name="P54" style:family="paragraph" style:parent-style-name="Text_20_body" style:list-style-name="L57"/>
    <style:style style:name="P55" style:family="paragraph" style:parent-style-name="Text_20_body" style:list-style-name="L58"/>
    <style:style style:name="P56" style:family="paragraph" style:parent-style-name="Text_20_body" style:list-style-name="L59"/>
    <style:style style:name="P57" style:family="paragraph" style:parent-style-name="Text_20_body" style:list-style-name="L60"/>
    <style:style style:name="P58" style:family="paragraph" style:parent-style-name="Text_20_body" style:list-style-name="L61"/>
    <style:style style:name="P59" style:family="paragraph" style:parent-style-name="Text_20_body" style:list-style-name="L63"/>
    <style:style style:name="P60" style:family="paragraph" style:parent-style-name="Text_20_body" style:list-style-name="L64"/>
    <style:style style:name="P61" style:family="paragraph" style:parent-style-name="Text_20_body" style:list-style-name="L65"/>
    <style:style style:name="P62" style:family="paragraph" style:parent-style-name="Text_20_body" style:list-style-name="L66"/>
    <style:style style:name="P63" style:family="paragraph" style:parent-style-name="Text_20_body" style:list-style-name="L67"/>
    <style:style style:name="P64" style:family="paragraph" style:parent-style-name="Text_20_body" style:list-style-name="L68"/>
    <style:style style:name="P65" style:family="paragraph" style:parent-style-name="Text_20_body" style:list-style-name="L69"/>
    <style:style style:name="P66" style:family="paragraph" style:parent-style-name="Text_20_body" style:list-style-name="L70"/>
    <style:style style:name="P67" style:family="paragraph" style:parent-style-name="Text_20_body" style:list-style-name="L71"/>
    <style:style style:name="P68" style:family="paragraph" style:parent-style-name="Text_20_body">
      <style:paragraph-properties style:writing-mode="lr-tb"/>
    </style:style>
    <style:style style:name="P69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raz1" text:anchor-type="paragraph" svg:width="17cm" svg:height="12.405cm" draw:z-index="0"><draw:image xlink:href="Pictures/100002010000038700000293F276BEEB6F29E55B.png" xlink:type="simple" xlink:show="embed" xlink:actuate="onLoad"/></draw:frame><draw:frame draw:style-name="fr2" draw:name="Obraz2" text:anchor-type="paragraph" svg:x="0.198cm" svg:y="13.03cm" svg:width="17cm" svg:height="11.485cm" draw:z-index="1"><draw:image xlink:href="Pictures/100002010000037800000258DC4E20A2E0C709C8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Obraz3" text:anchor-type="paragraph" svg:width="17cm" svg:height="18.417cm" draw:z-index="2"><draw:image xlink:href="Pictures/10000201000003C00000041077B866F6310B739A.png" xlink:type="simple" xlink:show="embed" xlink:actuate="onLoad"/></draw:frame></text:p>
      <text:h text:style-name="Heading_20_1" text:outline-level="1">Rozmowa z Gemini</text:h>
      <text:section text:style-name="Sect1" text:name="chat-history">
        <text:p text:style-name="Text_20_body"/>
        <text:section text:style-name="Sect1" text:name="9bf46c7230cddd31">
          <text:p text:style-name="Text_20_body"/>
          <text:section text:style-name="Sect1" text:name="user-query-content-0">
            <text:p text:style-name="Text_20_body"/>
          </text:section>
        </text:section>
      </text:section>
      <text:section text:style-name="Sect1" text:name="Sekcja1">
        <text:p text:style-name="P68"><text:bookmark text:name="user-query-content-0"/>musze sie nauczyc entity framework database first w Riderze, bede robic aplikacje od zera taką jak tu, powiedz jak co zrobic w jaki sposób od kompletnego zera, po co to robimy, jak to ma działać, w <text:soft-page-break/>jaki sposób itd </text:p>
      </text:section>
      <text:section text:style-name="Sect2" text:name="model-response-message-contentr_9bf46c7230cddd31">
        <text:p text:style-name="Text_20_body"><text:bookmark text:name="p-rc_9498e478cf812e9e-43"/>Rozumiem, że stoisz przed zadaniem stworzenia aplikacji Web API od zera, korzystając z podejścia Database First w Entity Framework Core (EF Core). To świetny moment na naukę. Podejście to bywa na początku zawiłe, ale opiera się na bardzo logicznym schemacie. </text:p>
      </text:section>
      <text:p text:style-name="Text_20_body"><text:bookmark text:name="p-rc_9498e478cf812e9e-431"/>Zbudujemy tę wiedzę krok po kroku. Wyjaśnię Ci, <text:span text:style-name="T1">po co to robimy</text:span>, <text:span text:style-name="T1">jak to działa</text:span> i <text:span text:style-name="T1">jak to przekuć na kod</text:span> w środowisku JetBrains Rider.</text:p>
      <text:h text:style-name="Heading_20_3" text:outline-level="3">1. Zrozumienie koncepcji: Czym jest "Database First"?</text:h>
      <text:p text:style-name="Text_20_body"><text:bookmark text:name="p-rc_9498e478cf812e9e-44"/>W standardowym programowaniu często piszemy klasy w C#, a potem framework tworzy z nich bazę danych (Code First). Tutaj robimy odwrotnie. Zadanie wymaga użycia <text:span text:style-name="T1">Database First</text:span>. Oznacza to, że: </text:p>
      <text:list xml:id="list441110974746698106" text:style-name="L1">
        <text:list-item>
          <text:p text:style-name="P5"><text:bookmark text:name="p-rc_9498e478cf812e9e-441"/><text:bookmark text:name="p-rc_9498e478cf812e9e-45"/>Najpierw tworzysz fizyczną bazę danych używając dostarczonego skryptu <text:span text:style-name="Source_20_Text">create.sql</text:span>. </text:p>
        </text:list-item>
      </text:list>
      <text:list xml:id="list4534560844125642514" text:style-name="L3">
        <text:list-item>
          <text:p text:style-name="P6"><text:bookmark text:name="p-rc_9498e478cf812e9e-451"/><text:bookmark text:name="p-rc_9498e478cf812e9e-46"/>Następnie używasz narzędzia (procesu zwanego <text:span text:style-name="T1">scaffolding</text:span> ), które "skanuje" Twoją bazę danych i automatycznie generuje dla niej odpowiednie klasy w C# (tzw. modele lub encje) oraz specjalną klasę <text:span text:style-name="Source_20_Text">DbContext</text:span>, która służy do komunikacji z bazą. </text:p>
        </text:list-item>
      </text:list>
      <text:list xml:id="list1308945810606830818" text:style-name="L4">
        <text:list-item text:start-value="2">
          <text:p text:style-name="P7"><text:bookmark text:name="p-rc_9498e478cf812e9e-461"/></text:p>
        </text:list-item>
      </text:list>
      <text:p text:style-name="Text_20_body"><text:span text:style-name="T1">Po co to robimy?</text:span> Żeby nie pisać ręcznie dziesiątek klas (np. <text:span text:style-name="Source_20_Text">Patient</text:span>, <text:span text:style-name="Source_20_Text">Ward</text:span>, <text:span text:style-name="Source_20_Text">BedAssignment</text:span>), które odpowiadają tabelom w bazie. Pozwalamy, aby EF Core wygenerował je za nas, co oszczędza czas i eliminuje literówki.</text:p>
      <text:h text:style-name="Heading_20_3" text:outline-level="3">2. Krok po kroku: Jak to zrobić od zera w Riderze?</text:h>
      <text:h text:style-name="Heading_20_4" text:outline-level="4">Krok 1: Przygotowanie bazy danych (Zadanie 1)</text:h>
      <text:p text:style-name="Text_20_body">Zanim dotkniesz C#, musisz mieć bazę.</text:p>
      <text:list xml:id="list1767138576825786480" text:style-name="L5">
        <text:list-item>
          <text:p text:style-name="P8">Musisz postawić lokalny serwer SQL (np. SQL Server Express lub użyć kontenera Docker).</text:p>
        </text:list-item>
        <text:list-item>
          <text:p text:style-name="P8">Uruchom skrypt <text:span text:style-name="Source_20_Text">create.sql</text:span>, aby utworzyć strukturę tabel (Pacjentów, Oddziałów, Łóżek itp.) i wypełnić je przykładowymi danymi z sekcji DML.</text:p>
        </text:list-item>
      </text:list>
      <text:h text:style-name="Heading_20_4" text:outline-level="4">Krok 2: Utworzenie projektu w Riderze</text:h>
      <text:list xml:id="list8604104361495134997" text:style-name="L6">
        <text:list-item>
          <text:p text:style-name="P9">Otwórz JetBrains Rider i wybierz <text:span text:style-name="T1">New Solution</text:span>.</text:p>
        </text:list-item>
        <text:list-item>
          <text:p text:style-name="P9">Wybierz szablon <text:span text:style-name="T1">ASP.NET Core Web API</text:span>.</text:p>
        </text:list-item>
        <text:list-item>
          <text:p text:style-name="P9">Wybierz docelowy framework (np. .NET 8), odznacz opcje związane z autoryzacją (jeśli nie są wymagane) i stwórz projekt.</text:p>
        </text:list-item>
      </text:list>
      <text:h text:style-name="Heading_20_4" text:outline-level="4">Krok 3: Instalacja niezbędnych paczek (NuGet)</text:h>
      <text:p text:style-name="Text_20_body">Aby EF Core mógł "porozmawiać" z Twoim SQL Serverem i wykonać inżynierię odwrotną, potrzebujesz zainstalować odpowiednie biblioteki z menedżera pakietów NuGet:</text:p>
      <text:list xml:id="list3355213004617949394" text:style-name="L7">
        <text:list-item>
          <text:p text:style-name="P10"><text:span text:style-name="Source_20_Text">Microsoft.EntityFrameworkCore.SqlServer</text:span> (pozwala na komunikację z bazą Microsoft SQL).</text:p>
        </text:list-item>
        <text:list-item>
          <text:p text:style-name="P10"><text:soft-page-break/><text:span text:style-name="Source_20_Text">Microsoft.EntityFrameworkCore.Design</text:span> (niezbędne do generowania kodu w czasie projektowania).</text:p>
        </text:list-item>
        <text:list-item>
          <text:p text:style-name="P10"><text:span text:style-name="Source_20_Text">Microsoft.EntityFrameworkCore.Tools</text:span> (dostarcza komendy do konsoli).</text:p>
        </text:list-item>
      </text:list>
      <text:h text:style-name="Heading_20_4" text:outline-level="4">Krok 4: Magia Scaffolding'u (Inżynieria odwrotna)</text:h>
      <text:p text:style-name="Text_20_body"><text:bookmark text:name="p-rc_9498e478cf812e9e-47"/>Tutaj dzieje się najważniejsze. W Riderze otwierasz terminal na dole ekranu (upewnij się, że masz zainstalowane narzędzia globalne .NET EF komendą <text:span text:style-name="Source_20_Text">dotnet tool install --global dotnet-ef</text:span>) i wpisujesz komendę: </text:p>
      <text:p text:style-name="Text_20_body"><text:bookmark text:name="p-rc_9498e478cf812e9e-471"/>Bash</text:p>
      <text:p text:style-name="P1"><text:span text:style-name="Source_20_Text">dotnet ef dbcontext scaffold "Data Source=TWÓJ_SERWER;Initial Catalog=TWOJA_BAZA;Integrated Security=True;Encrypt=False" Microsoft.EntityFrameworkCore.SqlServer -o Models -c HospitalDbContext</text:span></text:p>
      <text:list xml:id="list7017783219461307694" text:style-name="L8">
        <text:list-item>
          <text:p text:style-name="P11"><text:span text:style-name="T1">"Data Source=..."</text:span>: To tzw. Connection String (musisz go podmienić na swoje dane logowania do bazy).</text:p>
        </text:list-item>
        <text:list-item>
          <text:p text:style-name="P11"><text:span text:style-name="T1">Microsoft.EntityFrameworkCore.SqlServer</text:span>: Wskazuje dostawcę bazy danych.</text:p>
        </text:list-item>
        <text:list-item>
          <text:p text:style-name="P11"><text:span text:style-name="T1">-o Models</text:span>: Mówi EF Core, aby wrzucił wygenerowane klasy C# do folderu o nazwie <text:span text:style-name="Source_20_Text">Models</text:span>.</text:p>
        </text:list-item>
        <text:list-item>
          <text:p text:style-name="P11"><text:span text:style-name="T1">-c HospitalDbContext</text:span>: Nazywa Twoją główną klasę komunikacyjną <text:span text:style-name="Source_20_Text">HospitalDbContext</text:span>.</text:p>
        </text:list-item>
      </text:list>
      <text:p text:style-name="Text_20_body">Po tym kroku zobaczysz w projekcie nowe pliki odpowiadające diagramowi <text:span text:style-name="Source_20_Text">Hospital-ERD.png</text:span>.</text:p>
      <text:h text:style-name="Heading_20_3" text:outline-level="3">3. Logika aplikacji: Jak to ma działać (Zadanie 2 i 3)</text:h>
      <text:p text:style-name="Text_20_body">Kiedy masz już bazę połączoną z kodem, Twoim celem jest napisanie kontrolerów obsługujących żądania HTTP.</text:p>
      <text:p text:style-name="Text_20_body"><text:bookmark text:name="p-rc_9498e478cf812e9e-48"/><text:span text:style-name="T1">Zadanie 2: Pobieranie pacjentów (</text:span><text:span text:style-name="Source_20_Text"><text:span text:style-name="T1">GET /api/patients</text:span></text:span><text:span text:style-name="T1">)</text:span> </text:p>
      <text:list xml:id="list2729969449684216255" text:style-name="L9">
        <text:list-item>
          <text:p text:style-name="P12"><text:bookmark text:name="p-rc_9498e478cf812e9e-481"/><text:span text:style-name="T1">Jak to działa:</text:span> Klient (np. przeglądarka) wysyła zapytanie <text:span text:style-name="Source_20_Text">GET</text:span>. Ty musisz użyć wygenerowanego <text:span text:style-name="Source_20_Text">HospitalDbContext</text:span>, aby pobrać tabelę pacjentów wraz z ich przyjęciami (<text:span text:style-name="Source_20_Text">Admissions</text:span>) i przypisaniami do łóżek (<text:span text:style-name="Source_20_Text">BedAssignments</text:span>).</text:p>
        </text:list-item>
        <text:list-item>
          <text:p text:style-name="P12"><text:bookmark text:name="p-rc_9498e478cf812e9e-49"/><text:span text:style-name="T1">Filtrowanie:</text:span> Jeśli ktoś dopisze <text:span text:style-name="Source_20_Text">?search=Kowal</text:span>, musisz przefiltrować bazę po imieniu lub nazwisku (używając instrukcji LIKE / <text:span text:style-name="Source_20_Text">%</text:span> na poziomie bazy, co w C# osiąga się metodą <text:span text:style-name="Source_20_Text">.Contains()</text:span> w LINQ lub <text:span text:style-name="Source_20_Text">EF.Functions.Like()</text:span>). </text:p>
        </text:list-item>
      </text:list>
      <text:list xml:id="list3892173063912882950" text:style-name="L11">
        <text:list-item>
          <text:p text:style-name="P13"><text:bookmark text:name="p-rc_9498e478cf812e9e-491"/><text:bookmark text:name="p-rc_9498e478cf812e9e-50"/><text:span text:style-name="T1">Formatowanie:</text:span> Wynik musi idealnie pasować do struktury z pliku <text:span text:style-name="Source_20_Text">GET.json</text:span>. Zazwyczaj wymaga to przemapowania pobranych danych z bazy na nowe klasy DTO (Data Transfer Objects), aby uniknąć błędów związanych z cyklami w JSON. </text:p>
        </text:list-item>
      </text:list>
      <text:list xml:id="list665147844622343921" text:style-name="L12">
        <text:list-item>
          <text:p text:style-name="P14"><text:bookmark text:name="p-rc_9498e478cf812e9e-501"/></text:p>
        </text:list-item>
      </text:list>
      <text:p text:style-name="Text_20_body"><text:bookmark text:name="p-rc_9498e478cf812e9e-51"/><text:span text:style-name="T1">Zadanie 3: Przypisywanie łóżek (</text:span><text:span text:style-name="Source_20_Text"><text:span text:style-name="T1">POST /api/patients/{pesel}/bedassignments</text:span></text:span><text:span text:style-name="T1">)</text:span> </text:p>
      <text:list xml:id="list3042705649594588147" text:style-name="L13">
        <text:list-item>
          <text:p text:style-name="P15"><text:bookmark text:name="p-rc_9498e478cf812e9e-511"/><text:bookmark text:name="p-rc_9498e478cf812e9e-52"/><text:soft-page-break/><text:span text:style-name="T1">Jak to działa:</text:span> Serwer odbiera żądanie z JSON-em zdefiniowanym w <text:span text:style-name="Source_20_Text">POST.json</text:span> (okres czasu, typ łóżka, oddział). </text:p>
        </text:list-item>
      </text:list>
      <text:list xml:id="list5918614603618816666" text:style-name="L15">
        <text:list-item>
          <text:p text:style-name="P16"><text:bookmark text:name="p-rc_9498e478cf812e9e-521"/><text:span text:style-name="T1">Logika biznesowa:</text:span> Musisz napisać zapytanie, które sprawdzi bazę danych i znajdzie konkretne <text:span text:style-name="Source_20_Text">BedId</text:span> na podstawie:</text:p>
        </text:list-item>
      </text:list>
      <text:list xml:id="list3774444271478316630" text:style-name="L16">
        <text:list-item>
          <text:p text:style-name="P17">Przekazanego oddziału (Ward).</text:p>
        </text:list-item>
        <text:list-item>
          <text:p text:style-name="P17">Przekazanego typu łóżka (BedType).</text:p>
        </text:list-item>
        <text:list-item>
          <text:p text:style-name="P17"><text:bookmark text:name="p-rc_9498e478cf812e9e-53"/>Czasu (To i From z żądania) - łóżko nie może mieć w tym czasie aktywnego przypisania w tabeli <text:span text:style-name="Source_20_Text">BedAssignments</text:span>. </text:p>
        </text:list-item>
      </text:list>
      <text:list xml:id="list6966649318122020395" text:style-name="L18">
        <text:list-item text:start-value="3">
          <text:p text:style-name="P18"><text:bookmark text:name="p-rc_9498e478cf812e9e-531"/></text:p>
        </text:list-item>
      </text:list>
      <text:list xml:id="list7325335440095386778" text:style-name="L19">
        <text:list-item>
          <text:p text:style-name="P19"><text:bookmark text:name="p-rc_9498e478cf812e9e-54"/><text:span text:style-name="T1">Walidacja:</text:span> Jeśli program nie znajdzie takiego łóżka, musisz wywołać w kontrolerze np. <text:span text:style-name="Source_20_Text">return NotFound("Brak wolnego łóżka na wskazanym oddziale we wskazanym czasie.");</text:span> co zwróci kod HTTP 404 z czytelnym komunikatem. Jeśli łóżko się znajdzie, tworzysz nowy obiekt, dodajesz do bazy i wywołujesz <text:span text:style-name="Source_20_Text">SaveChanges()</text:span>. </text:p>
        </text:list-item>
      </text:list>
      <text:section text:style-name="Sect2" text:name="Sekcja2">
        <text:list xml:id="list2700937805730333696" text:style-name="L20">
          <text:list-item>
            <text:p text:style-name="P20"><text:bookmark text:name="model-response-message-contentr_9bf46c7230cddd31"/><text:bookmark text:name="p-rc_9498e478cf812e9e-541"/></text:p>
          </text:list-item>
        </text:list>
        <text:p text:style-name="Text_20_body">Wiem, że brzmi to jak dużo nowej wiedzy, ale w praktyce, gdy przejdziemy przez pierwszy etap, reszta staje się pisaniem logiki zapytanie-odpowiedź.</text:p>
        <text:p text:style-name="Text_20_body">Od czego wolisz zacząć: od instrukcji, jak postawić tę bazę w SQL Server, czy masz już ten etap za sobą i przechodzimy prosto do wyklikania projektu i scaffoldingu w Riderze?</text:p>
      </text:section>
      <text:section text:style-name="Sect1" text:name="Sekcja3">
        <text:p text:style-name="Text_20_body"><text:bookmark text:name="9bf46c7230cddd31"/></text:p>
      </text:section>
      <text:section text:style-name="Sect1" text:name="0bc91449b82e7943">
        <text:p text:style-name="Text_20_body"/>
        <text:section text:style-name="Sect1" text:name="user-query-content-1">
          <text:p text:style-name="Text_20_body"/>
        </text:section>
      </text:section>
      <text:section text:style-name="Sect1" text:name="Sekcja4">
        <text:p text:style-name="P68"><text:bookmark text:name="user-query-content-1"/>mam cos takiego, a na kolosie mam uzyc Data Source=(localdb)\MSSQLLocalDB;Initial Catalog=master;Integrated Security=True; ale nie wiem jak to zrobic, zainstalowalem juz to co trzeba </text:p>
      </text:section>
      <text:section text:style-name="Sect2" text:name="model-response-message-contentr_0bc91449b82e7943">
        <text:p text:style-name="Text_20_body">Świetnie, skoro masz już zainstalowany LocalDB, najtrudniejszą część konfiguracji środowiska masz za sobą!</text:p>
        <text:p text:style-name="Text_20_body">To, co masz na screenie, to po prostu wbudowana, "lekka" wersja SQL Servera idealna do deweloperki i na kolokwia. Zamiast stawiać ciężki serwer, aplikacja podłącza się do lokalnego pliku/instancji.</text:p>
        <text:p text:style-name="Text_20_body">Fakt, że na kolokwium masz użyć <text:span text:style-name="Source_20_Text">Initial Catalog=master</text:span>, oznacza po prostu, że wykładowca chce uprościć sprawę – nie musicie tworzyć osobnej bazy danych (jak na screenie <text:span text:style-name="Source_20_Text">apbd</text:span>), tylko wrzucicie tabele prosto do głównej bazy systemowej o nazwie <text:span text:style-name="Source_20_Text">master</text:span>. W komercyjnych projektach tego nie robimy, ale na kolokwium to standardowy trik na oszczędzenie czasu.</text:p>
        <text:p text:style-name="Text_20_body">Oto jak dokładnie to zrobić w Riderze, krok po kroku:</text:p>
        <text:h text:style-name="Heading_20_3" text:outline-level="3"><text:soft-page-break/>Krok 1: Podłączenie do LocalDB w Riderze</text:h>
        <text:p text:style-name="Text_20_body">Zanim wygenerujesz kod w C#, musisz "wlać" ten skrypt <text:span text:style-name="Source_20_Text">create.sql</text:span> do swojej bazy <text:span text:style-name="Source_20_Text">master</text:span>. Zrobimy to bezpośrednio z poziomu Ridera.</text:p>
        <text:list xml:id="list7666392702811743170" text:style-name="L21">
          <text:list-item>
            <text:p text:style-name="P21">Zlokalizuj zakładkę <text:span text:style-name="T1">Database</text:span> (zazwyczaj znajduje się na prawym, bocznym pasku narzędzi Ridera).</text:p>
          </text:list-item>
          <text:list-item>
            <text:p text:style-name="P21">Kliknij ikonę <text:span text:style-name="Source_20_Text"><text:span text:style-name="T1">+</text:span></text:span> (New) w lewym górnym rogu tej zakładki, a następnie wybierz <text:span text:style-name="T1">Data Source</text:span> -&gt; <text:span text:style-name="T1">Microsoft SQL Server</text:span>.</text:p>
          </text:list-item>
          <text:list-item>
            <text:p text:style-name="P21">W oknie konfiguracji, które się pojawi, wypełnij dane dokładnie tak, by pasowały do Twojego Connection Stringa:</text:p>
            <text:list>
              <text:list-item>
                <text:p text:style-name="P21"><text:span text:style-name="T1">Authentication:</text:span> Zmień na <text:span text:style-name="Source_20_Text">Windows Credentials</text:span> (to odpowiada za <text:span text:style-name="Source_20_Text">Integrated Security=True</text:span> z Twojego stringa).</text:p>
              </text:list-item>
              <text:list-item>
                <text:p text:style-name="P21"><text:span text:style-name="T1">Host:</text:span> Wpisz <text:span text:style-name="Source_20_Text">(localdb)\MSSQLLocalDB</text:span></text:p>
              </text:list-item>
              <text:list-item>
                <text:p text:style-name="P21"><text:span text:style-name="T1">Database:</text:span> Wpisz <text:span text:style-name="Source_20_Text">master</text:span></text:p>
              </text:list-item>
            </text:list>
          </text:list-item>
          <text:list-item>
            <text:p text:style-name="P21">U dołu okna może pojawić się komunikat "Download missing driver files". Jeśli go widzisz, kliknij <text:span text:style-name="T1">Download</text:span>.</text:p>
          </text:list-item>
          <text:list-item>
            <text:p text:style-name="P21">Kliknij przycisk <text:span text:style-name="T1">Test Connection</text:span>. Jeśli wszystko zaświeci się na zielono, kliknij <text:span text:style-name="T1">OK</text:span>.</text:p>
          </text:list-item>
        </text:list>
        <text:h text:style-name="Heading_20_3" text:outline-level="3">Krok 2: Uruchomienie skryptu <text:span text:style-name="Source_20_Text">create.sql</text:span></text:h>
        <text:p text:style-name="Text_20_body">Teraz musisz utworzyć tabele, które przed chwilą podłączyłeś.</text:p>
        <text:list xml:id="list5511303046795896894" text:style-name="L22">
          <text:list-item>
            <text:p text:style-name="P22">Otwórz w Riderze plik <text:span text:style-name="Source_20_Text">create.sql</text:span> (lub skopiuj jego zawartość).</text:p>
          </text:list-item>
          <text:list-item>
            <text:p text:style-name="P22">Jeśli masz go otwartego w edytorze, w prawym górnym rogu nad kodem SQL powinieneś widzieć rozwijaną listę (Session). Wybierz z niej połączenie, które przed chwilą stworzyłeś (np. <text:span text:style-name="Source_20_Text">master@localhost</text:span>).</text:p>
          </text:list-item>
          <text:list-item>
            <text:p text:style-name="P22">Zaznacz cały tekst skryptu (Ctrl+A) i kliknij zielony trójkąt <text:span text:style-name="T1">Execute</text:span> (lub wciśnij Ctrl+Enter).</text:p>
          </text:list-item>
          <text:list-item>
            <text:p text:style-name="P22">W konsoli na dole powinieneś zobaczyć, że komendy wykonały się pomyślnie. Twoje tabele (Pacjenci, Oddziały itp.) są już w bazie.</text:p>
          </text:list-item>
        </text:list>
        <text:h text:style-name="Heading_20_3" text:outline-level="3">Krok 3: Generowanie modeli z użyciem Twojego Connection Stringa (Scaffolding)</text:h>
        <text:p text:style-name="Text_20_body">Teraz wracamy do magii Entity Framework. Użyjemy Twojego konkretnego Connection Stringa, żeby EF Core "zobaczył" tabele w bazie <text:span text:style-name="Source_20_Text">master</text:span> i utworzył z nich klasy C#.</text:p>
        <text:list xml:id="list8507407005352381167" text:style-name="L23">
          <text:list-item>
            <text:p text:style-name="P23">Otwórz terminal na dole ekranu w Riderze.</text:p>
          </text:list-item>
          <text:list-item>
            <text:p text:style-name="P23">Upewnij się, że jesteś w folderze z Twoim projektem Web API.</text:p>
          </text:list-item>
          <text:list-item>
            <text:p text:style-name="P23">Wklej poniższą komendę i zatwierdź Enterem (dodałem parametr <text:span text:style-name="Source_20_Text">TrustServerCertificate=True</text:span>, który często jest wymagany w nowszych wersjach <text:soft-page-break/>EF Core przy lokalnych bazach, aby nie rzucało błędem certyfikatu SSL):</text:p>
          </text:list-item>
        </text:list>
        <text:p text:style-name="P69">Bash</text:p>
      </text:section>
      <text:section text:style-name="Sect2" text:name="Sekcja5">
        <text:p text:style-name="P1"><text:bookmark text:name="model-response-message-contentr_0bc91449b82e7943"/><text:span text:style-name="Source_20_Text">dotnet ef dbcontext scaffold "Data Source=(localdb)\MSSQLLocalDB;Initial Catalog=master;Integrated Security=True;TrustServerCertificate=True" Microsoft.EntityFrameworkCore.SqlServer -o Models -c HospitalDbContext</text:span></text:p>
        <text:p text:style-name="Text_20_body">Po wykonaniu tej komendy, w Twoim projekcie powinien pojawić się folder <text:span text:style-name="Source_20_Text">Models</text:span>, a w nim <text:span text:style-name="Source_20_Text">HospitalDbContext</text:span> oraz klasy takie jak <text:span text:style-name="Source_20_Text">Patient.cs</text:span>, <text:span text:style-name="Source_20_Text">Admissions.cs</text:span> itp.</text:p>
        <text:p text:style-name="Text_20_body">Czy komenda przeszła pomyślnie i modele wygenerowały się w Twoim projekcie, czy napotkałeś po drodze jakiś błąd w konsoli?</text:p>
      </text:section>
      <text:section text:style-name="Sect1" text:name="Sekcja6">
        <text:p text:style-name="Text_20_body"><text:bookmark text:name="0bc91449b82e7943"/></text:p>
      </text:section>
      <text:section text:style-name="Sect1" text:name="f13359422602af41">
        <text:p text:style-name="Text_20_body"/>
        <text:section text:style-name="Sect1" text:name="user-query-content-2">
          <text:p text:style-name="Text_20_body"/>
        </text:section>
      </text:section>
      <text:section text:style-name="Sect1" text:name="Sekcja7">
        <text:p text:style-name="P68"><text:bookmark text:name="user-query-content-2"/>no ale teraz nie jestem na kolosie tylko w domu, powiedz jak zrobic w domu </text:p>
      </text:section>
      <text:section text:style-name="Sect2" text:name="model-response-message-contentr_f13359422602af41">
        <text:p text:style-name="Text_20_body"><text:bookmark text:name="p-rc_74ad64a85ecda58d-57"/>Jasne, w domu zrobimy to porządnie! Skoro nie jesteś na kolokwium, nie będziemy śmiecić w systemowej bazie <text:span text:style-name="Source_20_Text">master</text:span>. Zamiast tego, utworzymy dedykowaną bazę dla Twojego projektu, co jest dużo lepszą i bezpieczniejszą praktyką. </text:p>
      </text:section>
      <text:section text:style-name="Sect2" text:name="Sekcja8">
        <text:p text:style-name="Text_20_body"><text:bookmark text:name="model-response-message-contentr_f13359422602af41"/><text:bookmark text:name="p-rc_74ad64a85ecda58d-571"/>Skoro masz już zainstalowany LocalDB, proces będzie bardzo podobny, ale z jednym dodatkowym krokiem na początku.</text:p>
        <text:h text:style-name="Heading_20_3" text:outline-level="3">Krok 1: Utworzenie nowej bazy w LocalDB z poziomu Ridera</text:h>
        <text:p text:style-name="Text_20_body">Najpierw musimy stworzyć pusty "pojemnik" na Twoje tabele.</text:p>
        <text:list xml:id="list7846079058581419909" text:style-name="L24">
          <text:list-item>
            <text:p text:style-name="P24">Otwórz zakładkę <text:span text:style-name="T1">Database</text:span> (po prawej stronie w Riderze).</text:p>
          </text:list-item>
          <text:list-item>
            <text:p text:style-name="P24">Kliknij <text:span text:style-name="Source_20_Text"><text:span text:style-name="T1">+</text:span></text:span> -&gt; <text:span text:style-name="T1">Data Source</text:span> -&gt; <text:span text:style-name="T1">Microsoft SQL Server</text:span>.</text:p>
          </text:list-item>
          <text:list-item>
            <text:p text:style-name="P24">Ustaw <text:span text:style-name="T1">Authentication</text:span> na <text:span text:style-name="Source_20_Text">Windows Credentials</text:span>.</text:p>
          </text:list-item>
          <text:list-item>
            <text:p text:style-name="P24">W polu <text:span text:style-name="T1">Host</text:span> wpisz <text:span text:style-name="Source_20_Text">(localdb)\MSSQLLocalDB</text:span>.</text:p>
          </text:list-item>
          <text:list-item>
            <text:p text:style-name="P24">Pole <text:span text:style-name="T1">Database</text:span> zostaw puste (lub wpisz <text:span text:style-name="Source_20_Text">master</text:span> tylko po to, żeby nawiązać początkowe połączenie).</text:p>
          </text:list-item>
          <text:list-item>
            <text:p text:style-name="P24">Kliknij <text:span text:style-name="T1">Test Connection</text:span> i jeśli jest zielone, kliknij <text:span text:style-name="T1">OK</text:span>.</text:p>
          </text:list-item>
          <text:list-item>
            <text:p text:style-name="P24">Teraz kliknij prawym przyciskiem myszy na to nowe połączenie na liście, wybierz <text:span text:style-name="T1">New</text:span> -&gt; <text:span text:style-name="T1">Query Console</text:span>.</text:p>
          </text:list-item>
          <text:list-item>
            <text:p text:style-name="P24">Wpisz poniższą komendę i uruchom ją (zielony trójkąt lub Ctrl+Enter):</text:p>
          </text:list-item>
        </text:list>
        <text:p text:style-name="Text_20_body">CREATE DATABASE HospitalDb;</text:p>
        <text:p text:style-name="Preformatted_20_Text"><text:span text:style-name="Source_20_Text">9. <text:s/>Kliknij przycisk **Refresh** (ikonka odświeżania w zakładce Database). Twoja nowa baza `HospitalDb` powinna pojawić się na liście.</text:span></text:p>
        <text:p text:style-name="Preformatted_20_Text"/>
        <text:p text:style-name="Preformatted_20_Text"><text:span text:style-name="Source_20_Text">---</text:span></text:p>
        <text:p text:style-name="Preformatted_20_Text"/>
        <text:p text:style-name="Preformatted_20_Text"><text:soft-page-break/><text:span text:style-name="Source_20_Text">### Krok 2: Wgranie struktury z `create.sql`</text:span></text:p>
        <text:p text:style-name="Preformatted_20_Text"/>
        <text:p text:style-name="Preformatted_20_Text"><text:span text:style-name="Source_20_Text">Teraz musimy wypełnić Twoją nową bazę tabelami.</text:span></text:p>
        <text:p text:style-name="Preformatted_20_Text"/>
        <text:p text:style-name="Preformatted_20_Text"><text:span text:style-name="Source_20_Text">1. <text:s/>Otwórz plik `create.sql`[cite: 2] w edytorze Ridera.</text:span></text:p>
        <text:p text:style-name="Preformatted_20_Text"><text:span text:style-name="Source_20_Text">2. <text:s/>Zwróć uwagę na prawy górny róg okna edytora nad kodem SQL. Z listy rozwijanej (Session) wybierz połączenie wskazujące na nowo utworzoną bazę, czyli coś w stylu `HospitalDb@localhost`.</text:span></text:p>
        <text:p text:style-name="Preformatted_20_Text"><text:span text:style-name="Source_20_Text">3. <text:s/>Zaznacz cały tekst skryptu (Ctrl+A) i uruchom go (Ctrl+Enter).</text:span></text:p>
        <text:p text:style-name="Preformatted_20_Text"><text:span text:style-name="Source_20_Text">4. <text:s/>Gdy komendy się wykonają, w Twojej bazie pojawią się tabele (Patients, Wards, Beds, Admissions itp.) oraz zostaną do nich wrzucone przykładowe dane[cite: 2].</text:span></text:p>
        <text:p text:style-name="Preformatted_20_Text"/>
        <text:p text:style-name="Preformatted_20_Text"><text:span text:style-name="Source_20_Text">---</text:span></text:p>
        <text:p text:style-name="Preformatted_20_Text"/>
        <text:p text:style-name="Preformatted_20_Text"><text:span text:style-name="Source_20_Text">### Krok 3: Magia Scaffolding'u (Entity Framework)</text:span></text:p>
        <text:p text:style-name="Preformatted_20_Text"/>
        <text:p text:style-name="Preformatted_20_Text"><text:span text:style-name="Source_20_Text">Teraz łączymy kod z nową bazą.</text:span></text:p>
        <text:p text:style-name="Preformatted_20_Text"/>
        <text:p text:style-name="Preformatted_20_Text"><text:span text:style-name="Source_20_Text">1. <text:s/>Otwórz terminal w Riderze (na dole ekranu).</text:span></text:p>
        <text:p text:style-name="Preformatted_20_Text"><text:span text:style-name="Source_20_Text">2. <text:s/>Upewnij się, że terminal znajduje się w folderze z Twoim projektem Web API.</text:span></text:p>
        <text:p text:style-name="Preformatted_20_Text"><text:span text:style-name="Source_20_Text">3. <text:s/>Wklej poniższą komendę. Zauważ, że tym razem w Connection Stringu używamy `Initial Catalog=HospitalDb`:</text:span></text:p>
        <text:p text:style-name="Preformatted_20_Text"/>
        <text:p text:style-name="Preformatted_20_Text"><text:span text:style-name="Source_20_Text">```bash</text:span></text:p>
        <text:p text:style-name="P1"><text:span text:style-name="Source_20_Text">dotnet ef dbcontext scaffold "Data Source=(localdb)\MSSQLLocalDB;Initial Catalog=HospitalDb;Integrated Security=True;TrustServerCertificate=True" Microsoft.EntityFrameworkCore.SqlServer -o Models -c HospitalDbContext</text:span></text:p>
        <text:p text:style-name="Text_20_body">Po chwili w Twoim projekcie powinien pojawić się folder <text:span text:style-name="Source_20_Text">Models</text:span>, a w nim <text:span text:style-name="Source_20_Text">HospitalDbContext</text:span> i wszystkie niezbędne klasy wygenerowane na podstawie bazy.</text:p>
        <text:p text:style-name="Text_20_body">Czy udało się pomyślnie wygenerować modele i jesteś gotów przejść do pisania logiki pierwszego endpointa GET z Zadania 2?</text:p>
      </text:section>
      <text:section text:style-name="Sect1" text:name="Sekcja9">
        <text:p text:style-name="Text_20_body"><text:bookmark text:name="f13359422602af41"/></text:p>
      </text:section>
      <text:section text:style-name="Sect1" text:name="fe9f87a11af079b0">
        <text:p text:style-name="Text_20_body"/>
        <text:section text:style-name="Sect1" text:name="user-query-content-3">
          <text:p text:style-name="Text_20_body"/>
        </text:section>
      </text:section>
      <text:section text:style-name="Sect1" text:name="Sekcja10">
        <text:p text:style-name="P68"><text:bookmark text:name="user-query-content-3"/>a robic new solution najpierw? </text:p>
      </text:section>
      <text:section text:style-name="Sect2" text:name="model-response-message-contentr_fe9f87a11af079b0">
        <text:p text:style-name="Text_20_body">Tak, dokładnie! Bardzo słuszna uwaga. Pośpieszyłem się z bazą danych, a przecież żeby mieć gdzie wygenerować kod i gdzie wpisywać komendy w terminalu, musisz najpierw mieć otwarty projekt.</text:p>
        <text:p text:style-name="Text_20_body">Oto właściwa, kompletna kolejność działań od momentu odpalenia Ridera:</text:p>
        <text:h text:style-name="Heading_20_3" text:outline-level="3">Krok 1: Utworzenie nowego Solution w Riderze</text:h>
        <text:list xml:id="list1701165125265239856" text:style-name="L25">
          <text:list-item>
            <text:p text:style-name="P25">Uruchom Ridera i na ekranie powitalnym kliknij <text:span text:style-name="T1">New Solution</text:span>.</text:p>
          </text:list-item>
          <text:list-item>
            <text:p text:style-name="P25">Z menu po lewej stronie wybierz szablon <text:span text:style-name="T1">ASP.NET Core Web API</text:span>.</text:p>
          </text:list-item>
          <text:list-item>
            <text:p text:style-name="P25">Po prawej stronie skonfiguruj projekt:</text:p>
            <text:list>
              <text:list-item>
                <text:p text:style-name="P25"><text:span text:style-name="T1">Solution name / Project name:</text:span> Wpisz np. <text:span text:style-name="Source_20_Text">HospitalApp</text:span>.</text:p>
              </text:list-item>
              <text:list-item>
                <text:p text:style-name="P25"><text:span text:style-name="T1">Framework:</text:span> Wybierz najnowszą wersję, jakiej używacie (prawdopodobnie <text:span text:style-name="T1">.NET 8.0</text:span>).</text:p>
              </text:list-item>
              <text:list-item>
                <text:p text:style-name="P25"><text:soft-page-break/><text:span text:style-name="T1">Type:</text:span> Zostaw na <text:span text:style-name="Source_20_Text">Controllers</text:span> (nie wybieraj Minimal API, jeśli na zajęciach robicie klasyczne kontrolery, a na to wskazuje treść zadania z koncówkami <text:span text:style-name="Source_20_Text">/api/patients</text:span>).</text:p>
              </text:list-item>
              <text:list-item>
                <text:p text:style-name="P25">Zaznacz opcję <text:span text:style-name="T1">Enable OpenAPI support</text:span> (to wygeneruje Ci Swagera, czyli super wygodną stronę do testowania Twoich końcówek).</text:p>
              </text:list-item>
              <text:list-item>
                <text:p text:style-name="P25">Opcję <text:span text:style-name="T1">Authentication type</text:span> zostaw na <text:span text:style-name="Source_20_Text">None</text:span>.</text:p>
              </text:list-item>
            </text:list>
          </text:list-item>
          <text:list-item>
            <text:p text:style-name="P25">Kliknij przycisk <text:span text:style-name="T1">Create</text:span>.</text:p>
          </text:list-item>
        </text:list>
        <text:h text:style-name="Heading_20_3" text:outline-level="3">Krok 2: Instalacja niezbędnych paczek NuGet</text:h>
        <text:p text:style-name="Text_20_body">Zanim zaczniesz cokolwiek generować, Twój świeży projekt musi dostać biblioteki Entity Framework Core, żeby wiedział, jak obsługiwać bazy SQL.</text:p>
        <text:list xml:id="list1211248782225902427" text:style-name="L26">
          <text:list-item>
            <text:p text:style-name="P26">Na samym dole okna Ridera znajdź i kliknij zakładkę <text:span text:style-name="T1">NuGet</text:span>.</text:p>
          </text:list-item>
          <text:list-item>
            <text:p text:style-name="P26">W oknie NuGet wpisz w pasek wyszukiwania po kolei te trzy paczki i po prawej stronie kliknij ikonkę <text:span text:style-name="T1">+</text:span> (Install), aby dodać je do Twojego projektu <text:span text:style-name="Source_20_Text">HospitalApp</text:span>:</text:p>
            <text:list>
              <text:list-item>
                <text:p text:style-name="P26"><text:span text:style-name="Source_20_Text">Microsoft.EntityFrameworkCore.SqlServer</text:span> <text:span text:style-name="T2">(pozwala projektowi rozmawiać z bazą SQL Server / LocalDB)</text:span></text:p>
              </text:list-item>
              <text:list-item>
                <text:p text:style-name="P26"><text:span text:style-name="Source_20_Text">Microsoft.EntityFrameworkCore.Design</text:span> <text:span text:style-name="T2">(potrzebne, aby proces "scaffoldingu" zadziałał)</text:span></text:p>
              </text:list-item>
              <text:list-item>
                <text:p text:style-name="P26"><text:span text:style-name="Source_20_Text">Microsoft.EntityFrameworkCore.Tools</text:span> <text:span text:style-name="T2">(dodaje obsługę komend EF w konsoli)</text:span></text:p>
              </text:list-item>
            </text:list>
          </text:list-item>
        </text:list>
        <text:p text:style-name="P27">(Pamiętaj, aby wersja instalowanych paczek zgadzała się z Twoim frameworkiem. Jeśli wybrałeś projekt w .NET 8, instaluj paczki w wersji 8.x.x).</text:p>
        <text:h text:style-name="Heading_20_3" text:outline-level="3">Co dalej?</text:h>
        <text:list xml:id="list4404716833864935132" text:style-name="L27">
          <text:list-item>
            <text:p text:style-name="P28">Kiedy masz już stworzony projekt i zainstalowane paczki, robisz <text:span text:style-name="T1">Krok 1 i Krok 2 z mojej poprzedniej wiadomości</text:span> (czyli łączysz się w Riderze w zakładce <text:span text:style-name="T2">Database</text:span>, tworzysz bazę i odpalasz skrypt <text:span text:style-name="Source_20_Text">create.sql</text:span>).</text:p>
          </text:list-item>
          <text:list-item>
            <text:p text:style-name="P28">A na sam koniec, na dole Ridera klikasz w zakładkę <text:span text:style-name="T1">Terminal</text:span> i wklejasz komendę ze słowem <text:span text:style-name="Source_20_Text">scaffold</text:span>, o której pisaliśmy. Wtedy Rider magicznie wygeneruje folder z klasami wprost do Twojego nowiutkiego projektu.</text:p>
          </text:list-item>
        </text:list>
        <text:p text:style-name="Text_20_body">Daj znać, jak tylko utworzysz projekt i zainstalujesz paczki. Udało się przebrnąć przez kreator bez błędów?</text:p>
      </text:section>
      <text:section text:style-name="Sect1" text:name="Sekcja11">
        <text:p text:style-name="Text_20_body"><text:bookmark text:name="fe9f87a11af079b0"/></text:p>
      </text:section>
      <text:section text:style-name="Sect1" text:name="c4c8eeda0d2f4df7">
        <text:p text:style-name="Text_20_body"/>
        <text:section text:style-name="Sect1" text:name="user-query-content-4">
          <text:p text:style-name="Text_20_body"/>
        </text:section>
      </text:section>
      <text:section text:style-name="Sect1" text:name="Sekcja12">
        <text:p text:style-name="P68"><text:bookmark text:name="user-query-content-4"/>nie mam nugeta </text:p>
      </text:section>
      <text:section text:style-name="Sect2" text:name="model-response-message-contentr_c4c8eeda0d2f4df7">
        <text:p text:style-name="Text_20_body"><text:soft-page-break/>Spokojnie, to bardzo częsty problem na początku. Interfejs Ridera potrafi czasami schować pewne okienka, zwłaszcza jeśli jesteś przyzwyczajony np. do Visual Studio.</text:p>
        <text:p text:style-name="Text_20_body">Masz trzy sposoby, żeby to obejść. Wybierz ten, który wydaje Ci się najwygodniejszy:</text:p>
        <text:h text:style-name="Heading_20_3" text:outline-level="3">Opcja 1: Z poziomu drzewka plików (Najbardziej klasyczna)</text:h>
        <text:list xml:id="list2526402404855075024" text:style-name="L28">
          <text:list-item>
            <text:p text:style-name="P29">Spójrz na lewą stronę ekranu, gdzie masz drzewko swojego projektu (okno <text:span text:style-name="T1">Explorer</text:span> lub <text:span text:style-name="T1">Solution</text:span>).</text:p>
          </text:list-item>
          <text:list-item>
            <text:p text:style-name="P29">Kliknij <text:span text:style-name="T1">prawym przyciskiem myszy</text:span> na nazwę Twojego projektu (np. <text:span text:style-name="Source_20_Text">HospitalApp</text:span>, na ikonkę z literką C#).</text:p>
          </text:list-item>
          <text:list-item>
            <text:p text:style-name="P29">Z menu kontekstowego wybierz opcję <text:span text:style-name="T1">Manage NuGet Packages</text:span>. Otworzy się odpowiednie okno na dole ekranu.</text:p>
          </text:list-item>
        </text:list>
        <text:h text:style-name="Heading_20_3" text:outline-level="3">Opcja 2: Magiczny skrót klawiszowy (Najszybsza)</text:h>
        <text:list xml:id="list9166787917208086688" text:style-name="L29">
          <text:list-item>
            <text:p text:style-name="P30">Wciśnij dwa razy szybko klawisz <text:span text:style-name="T1">Shift</text:span> (otworzy się okno wyszukiwania "Search Everywhere").</text:p>
          </text:list-item>
          <text:list-item>
            <text:p text:style-name="P30">Wpisz po prostu słowo <text:span text:style-name="Source_20_Text">NuGet</text:span>.</text:p>
          </text:list-item>
          <text:list-item>
            <text:p text:style-name="P30">Na liście wyników kliknij w okienko narzędziowe <text:span text:style-name="T1">NuGet</text:span> i Rider sam je wyciągnie na wierzch.</text:p>
          </text:list-item>
        </text:list>
        <text:h text:style-name="Heading_20_3" text:outline-level="3">Opcja 3: Instalacja przez Terminal (Najbardziej niezawodna)</text:h>
        <text:p text:style-name="Text_20_body">Skoro i tak będziemy zaraz używać terminala do komendy <text:span text:style-name="Source_20_Text">scaffold</text:span>, możesz pominąć klikanie i zainstalować te paczki prosto z konsoli.</text:p>
        <text:list xml:id="list5995725810907220223" text:style-name="L30">
          <text:list-item>
            <text:p text:style-name="P31">Otwórz <text:span text:style-name="T1">Terminal</text:span> (zakładka na samym dole okna Ridera).</text:p>
          </text:list-item>
          <text:list-item>
            <text:p text:style-name="P31">Upewnij się, że wklejasz komendy w folderze, gdzie jest Twój plik z rozszerzeniem <text:span text:style-name="Source_20_Text">.csproj</text:span> (domyślnie tak się otwiera).</text:p>
          </text:list-item>
          <text:list-item>
            <text:p text:style-name="P31">Wklej poniższe trzy komendy i po każdej wciśnij Enter:</text:p>
          </text:list-item>
        </text:list>
        <text:p text:style-name="P69">Bash</text:p>
      </text:section>
      <text:p text:style-name="P1"><text:span text:style-name="Source_20_Text">dotnet add package Microsoft.EntityFrameworkCore.SqlServer</text:span></text:p>
      <text:p text:style-name="Text_20_body">Bash</text:p>
      <text:p text:style-name="P1"><text:span text:style-name="Source_20_Text">dotnet add package Microsoft.EntityFrameworkCore.Design</text:span></text:p>
      <text:p text:style-name="P69">Bash</text:p>
      <text:section text:style-name="Sect2" text:name="Sekcja13">
        <text:p text:style-name="P1"><text:bookmark text:name="model-response-message-contentr_c4c8eeda0d2f4df7"/><text:span text:style-name="Source_20_Text">dotnet add package Microsoft.EntityFrameworkCore.Tools</text:span></text:p>
        <text:p text:style-name="Text_20_body">Wybierz jeden z tych sposobów. Czy udało Ci się dodać te paczki do projektu?</text:p>
      </text:section>
      <text:section text:style-name="Sect1" text:name="Sekcja14">
        <text:p text:style-name="P69"><text:bookmark text:name="c4c8eeda0d2f4df7"/></text:p>
      </text:section>
      <text:section text:style-name="Sect1" text:name="e4e7e94101e53af1">
        <text:p text:style-name="P69"/>
        <text:section text:style-name="Sect1" text:name="user-query-content-5">
          <text:p text:style-name="P69"/>
        </text:section>
      </text:section>
      <text:section text:style-name="Sect1" text:name="Sekcja15">
        <text:p text:style-name="P68"><text:bookmark text:name="user-query-content-5"/>co teraz </text:p>
      </text:section>
      <text:section text:style-name="Sect2" text:name="model-response-message-contentr_e4e7e94101e53af1">
        <text:p text:style-name="Text_20_body"><text:soft-page-break/>Wygląda na to, że masz nowszą wersję Ridera (lub nowy interfejs) i menu wygląda troszkę inaczej, niż zakładałem. Żaden problem!</text:p>
        <text:p text:style-name="Text_20_body">Oto co musisz teraz zrobić:</text:p>
        <text:list xml:id="list5236691362118474838" text:style-name="L31">
          <text:list-item>
            <text:p text:style-name="P32">Kliknij tę pierwszą opcję z listy na Twoim screenie, czyli <text:span text:style-name="T1">"Connect to Database..."</text:span>.</text:p>
          </text:list-item>
          <text:list-item>
            <text:p text:style-name="P32">Otworzy się nowe okno z kafelkami lub listą różnych baz danych. Znajdź tam i wybierz <text:span text:style-name="T1">Microsoft SQL Server</text:span>.</text:p>
          </text:list-item>
          <text:list-item>
            <text:p text:style-name="P32">Gdy otworzy się okno konfiguracji połączenia, wypełnij je tak, jak pisałem wcześniej:</text:p>
            <text:list>
              <text:list-item>
                <text:p text:style-name="P32"><text:span text:style-name="T1">Authentication:</text:span> Zmień na <text:span text:style-name="Source_20_Text">Windows Credentials</text:span>.</text:p>
              </text:list-item>
              <text:list-item>
                <text:p text:style-name="P32"><text:span text:style-name="T1">Host:</text:span> Wpisz <text:span text:style-name="Source_20_Text">(localdb)\MSSQLLocalDB</text:span></text:p>
              </text:list-item>
              <text:list-item>
                <text:p text:style-name="P32">Jeśli na dole okna pojawi się żółty komunikat o braku sterowników ("Missing driver files"), kliknij <text:span text:style-name="T1">Download</text:span>.</text:p>
              </text:list-item>
            </text:list>
          </text:list-item>
          <text:list-item>
            <text:p text:style-name="P32">Kliknij przycisk <text:span text:style-name="T1">Test Connection</text:span> (zazwyczaj na dole). Jeśli pojawi się zielony "ptaszek", kliknij <text:span text:style-name="T1">OK</text:span>.</text:p>
          </text:list-item>
        </text:list>
        <text:p text:style-name="Text_20_body">Daj znać, jak tylko dodasz to połączenie! Wtedy odpalimy konsolę, żeby stworzyć bazę <text:span text:style-name="Source_20_Text">HospitalDb</text:span>.</text:p>
      </text:section>
      <text:section text:style-name="Sect1" text:name="Sekcja16">
        <text:p text:style-name="P69"><text:bookmark text:name="e4e7e94101e53af1"/></text:p>
      </text:section>
      <text:section text:style-name="Sect1" text:name="1d52d9b2635d6723">
        <text:p text:style-name="P69"/>
        <text:section text:style-name="Sect1" text:name="user-query-content-6">
          <text:p text:style-name="P69"/>
        </text:section>
      </text:section>
      <text:section text:style-name="Sect1" text:name="Sekcja17">
        <text:p text:style-name="P68"><text:bookmark text:name="user-query-content-6"/>co teraz </text:p>
      </text:section>
      <text:section text:style-name="Sect2" text:name="model-response-message-contentr_1d52d9b2635d6723">
        <text:p text:style-name="Text_20_body">W tym oknie masz dwie ścieżki do wyboru. Obie zadziałają, wybierz tę, która wydaje Ci się łatwiejsza:</text:p>
        <text:p text:style-name="P33">Opcja 1: Ręczne wpisanie (zostawiasz tak, jak jest na screenie)</text:p>
        <text:list xml:id="list8082236330430164246" text:style-name="L32">
          <text:list-item>
            <text:p text:style-name="P34">Masz już wybrane <text:span text:style-name="Source_20_Text">Add data source manually</text:span> oraz <text:span text:style-name="Source_20_Text">Microsoft SQL Server</text:span>. Po prostu kliknij niebieski przycisk <text:span text:style-name="T1">Next</text:span>.</text:p>
          </text:list-item>
          <text:list-item>
            <text:p text:style-name="P34">W kolejnym oknie, które się pojawi, ustaw:</text:p>
            <text:list>
              <text:list-item>
                <text:p text:style-name="P34"><text:span text:style-name="T1">Host:</text:span> <text:span text:style-name="Source_20_Text">(localdb)\MSSQLLocalDB</text:span></text:p>
              </text:list-item>
              <text:list-item>
                <text:p text:style-name="P34"><text:span text:style-name="T1">Authentication:</text:span> <text:span text:style-name="Source_20_Text">Windows Credentials</text:span> (wybierz z listy rozwijanej).</text:p>
              </text:list-item>
            </text:list>
          </text:list-item>
          <text:list-item>
            <text:p text:style-name="P34">Jeśli na dole pojawi się komunikat o brakujących plikach ("Download missing driver files"), kliknij <text:span text:style-name="T1">Download</text:span>.</text:p>
          </text:list-item>
          <text:list-item>
            <text:p text:style-name="P34">Kliknij <text:span text:style-name="T1">Test Connection</text:span>. Jeśli jest zielone, kliknij <text:span text:style-name="T1">OK</text:span>.</text:p>
          </text:list-item>
        </text:list>
        <text:p text:style-name="P33">Opcja 2: Użycie gotowego kodu (szybsza)</text:p>
        <text:list xml:id="list3636579521662631520" text:style-name="L33">
          <text:list-item>
            <text:p text:style-name="P35">Zaznacz drugą opcję od góry: <text:span text:style-name="T1">Use connection string</text:span>.</text:p>
          </text:list-item>
          <text:list-item>
            <text:p text:style-name="P35">W polu <text:span text:style-name="T1">String</text:span>, które się odblokuje, wklej dokładnie ten tekst: <text:span text:style-name="Source_20_Text">Data Source=(localdb)\MSSQLLocalDB;Integrated </text:span><text:soft-page-break/><text:span text:style-name="Source_20_Text">Security=True;TrustServerCertificate=True</text:span></text:p>
          </text:list-item>
          <text:list-item>
            <text:p text:style-name="P35">Kliknij <text:span text:style-name="T1">Next</text:span> i jeśli program poprosi o pobranie sterowników (Download drivers), zrób to.</text:p>
          </text:list-item>
          <text:list-item>
            <text:p text:style-name="P35">Zakończ klikając <text:span text:style-name="T1">OK</text:span>.</text:p>
          </text:list-item>
        </text:list>
        <text:p text:style-name="Text_20_body">Po tym kroku połączenie pojawi się w zakładce Database po prawej stronie. Wtedy kliknij na nie prawym przyciskiem myszy, wybierz <text:span text:style-name="T1">New</text:span> -&gt; <text:span text:style-name="T1">Query Console</text:span>, wpisz <text:span text:style-name="Source_20_Text">CREATE DATABASE HospitalDb;</text:span> i uruchom zielonym trójkątem.</text:p>
      </text:section>
      <text:section text:style-name="Sect1" text:name="Sekcja18">
        <text:p text:style-name="P69"><text:bookmark text:name="1d52d9b2635d6723"/></text:p>
      </text:section>
      <text:section text:style-name="Sect1" text:name="6f364e5d8ad08931">
        <text:p text:style-name="P69"/>
      </text:section>
      <text:section text:style-name="Sect2" text:name="model-response-message-contentr_6f364e5d8ad08931">
        <text:p text:style-name="Text_20_body">Super, jesteśmy w idealnym miejscu! Masz podłączony serwer po prawej stronie i otwartą konsolę SQL (to duże, białe pole pośrodku).</text:p>
        <text:p text:style-name="Text_20_body">Teraz musimy utworzyć Twoją bazę danych i wgrać do niej tabele. Zrób to w tych 5 prostych krokach:</text:p>
        <text:p text:style-name="Text_20_body"><text:span text:style-name="T1">Krok 1: Utworzenie bazy</text:span> Wpisz w tym pustym, białym polu konsoli następujące polecenie:</text:p>
        <text:p text:style-name="P69">SQL</text:p>
      </text:section>
      <text:section text:style-name="Sect2" text:name="Sekcja19">
        <text:p text:style-name="P1"><text:bookmark text:name="model-response-message-contentr_6f364e5d8ad08931"/><text:span text:style-name="Source_20_Text">CREATE DATABASE HospitalDb;</text:span></text:p>
        <text:p text:style-name="Text_20_body"><text:span text:style-name="T1">Krok 2: Uruchomienie komendy</text:span> Kliknij <text:span text:style-name="T1">zielony trójkąt</text:span> (przycisk Play) w lewym górnym rogu okienka konsoli (lub wciśnij klawisze <text:span text:style-name="Source_20_Text">Ctrl + Enter</text:span>). Na dole ekranu powinieneś zobaczyć komunikat, że komenda wykonała się pomyślnie.</text:p>
        <text:p text:style-name="Text_20_body"><text:span text:style-name="T1">Krok 3: Odświeżenie listy baz</text:span> Przejdź do prawego panelu ("Database"). Kliknij przycisk <text:span text:style-name="T1">Refresh</text:span> (ta ikonka z dwiema strzałkami w kółko na samej górze panelu obok plusika). Rozwiń swoje połączenie "Microsoft SQL Server" (klikając strzałeczkę obok niego) – na liście powinna pojawić się Twoja nowa baza <text:span text:style-name="Source_20_Text">HospitalDb</text:span>.</text:p>
        <text:p text:style-name="Text_20_body"><text:span text:style-name="T1">Krok 4: Przełączenie się na nową bazę</text:span> To bardzo ważny krok! Spójrz na pasek narzędzi tuż nad białym polem konsoli. Po prawej stronie masz napisane na niebiesko <text:span text:style-name="Source_20_Text"><text:span text:style-name="T1">&lt;database&gt;</text:span></text:span>. Kliknij w to i z rozwijanej listy wybierz <text:span text:style-name="Source_20_Text">HospitalDb</text:span>. Dzięki temu upewnimy się, że tabele wgramy do Twojej nowej bazy, a nie do bazy systemowej.</text:p>
        <text:p text:style-name="Text_20_body"><text:span text:style-name="T1">Krok 5: Wgranie tabel i danych</text:span> Teraz skasuj z konsoli linijkę <text:span text:style-name="Source_20_Text">CREATE DATABASE...</text:span>. Otwórz pobrany plik <text:span text:style-name="Source_20_Text">create.sql</text:span>, skopiuj <text:span text:style-name="T1">całą</text:span> jego zawartość, wklej ją do tego samego, pustego teraz białego pola i ponownie kliknij <text:span text:style-name="T1">zielony trójkąt</text:span> (Play).</text:p>
        <text:p text:style-name="Text_20_body">Gdy to zrobisz, serwer utworzy wszystkie tabele (Pacjentów, Oddziały itp.) i wypełni je przykładowymi danymi. Daj znać, jak poszło! Potem przejdziemy już prosto do generowania kodu w terminalu.</text:p>
      </text:section>
      <text:section text:style-name="Sect1" text:name="Sekcja20">
        <text:p text:style-name="P69"><text:bookmark text:name="6f364e5d8ad08931"/></text:p>
      </text:section>
      <text:section text:style-name="Sect1" text:name="1649ee72fc5953f9">
        <text:p text:style-name="P69"/>
        <text:section text:style-name="Sect1" text:name="user-query-content-8">
          <text:p text:style-name="P69"/>
        </text:section>
      </text:section>
      <text:section text:style-name="Sect1" text:name="Sekcja21">
        <text:p text:style-name="P68"><text:bookmark text:name="user-query-content-8"/>nie ma </text:p>
      </text:section>
      <text:section text:style-name="Sect2" text:name="model-response-message-contentr_1649ee72fc5953f9">
        <text:p text:style-name="Text_20_body">Nie martw się, to częsta sytuacja w Riderze. Baza nie odświeżyła się automatycznie po wykonaniu <text:soft-page-break/>komendy <text:span text:style-name="Source_20_Text">CREATE DATABASE</text:span>.</text:p>
        <text:p text:style-name="Text_20_body">Zróbmy to tak, żeby na 100% się pojawiła:</text:p>
        <text:list xml:id="list1813077787313630571" text:style-name="L34">
          <text:list-item>
            <text:p text:style-name="P36"><text:span text:style-name="T1">Odśwież połączenie:</text:span> Kliknij prawym przyciskiem myszy na napis <text:span text:style-name="T1">"Microsoft SQL Server (JetBrains...)"</text:span> (to główne połączenie u góry).</text:p>
          </text:list-item>
          <text:list-item>
            <text:p text:style-name="P36">Z menu wybierz opcję <text:span text:style-name="T1">"Refresh"</text:span> (lub ikonę z dwoma strzałkami w kółko).</text:p>
          </text:list-item>
          <text:list-item>
            <text:p text:style-name="P36">Po chwili pod napisem <text:span text:style-name="Source_20_Text">master</text:span> powinna pojawić się Twoja nowa baza <text:span text:style-name="Source_20_Text">HospitalDb</text:span>.</text:p>
          </text:list-item>
        </text:list>
        <text:p text:style-name="P33">Gdy już ją zobaczysz:</text:p>
        <text:list xml:id="list1981277752931598314" text:style-name="L35">
          <text:list-item>
            <text:p text:style-name="P37">Kliknij na <text:span text:style-name="Source_20_Text">HospitalDb</text:span> lewym przyciskiem myszy.</text:p>
          </text:list-item>
          <text:list-item>
            <text:p text:style-name="P37">Teraz wróć do swojej konsoli (tego białego okna w środku ekranu).</text:p>
          </text:list-item>
          <text:list-item>
            <text:p text:style-name="P37">Spójrz na pasek narzędzi nad konsolą – tam, gdzie wcześniej było napisane <text:span text:style-name="Source_20_Text">&lt;database&gt;</text:span>, teraz rozwiń listę i wybierz z niej <text:span text:style-name="Source_20_Text">HospitalDb</text:span>. To jest kluczowe, bo mówi Riderowi: "teraz wykonuj komendy SQL na tej konkretnej bazie".</text:p>
          </text:list-item>
          <text:list-item>
            <text:p text:style-name="P37">Wklej zawartość pliku <text:span text:style-name="Source_20_Text">create.sql</text:span> i kliknij zielony trójkąt (<text:span text:style-name="T1">Execute</text:span>).</text:p>
          </text:list-item>
        </text:list>
        <text:p text:style-name="Text_20_body">Jeśli po odświeżeniu nadal nie widzisz <text:span text:style-name="Source_20_Text">HospitalDb</text:span>, spróbuj jeszcze raz wpisać w konsoli <text:span text:style-name="Source_20_Text">CREATE DATABASE HospitalDb;</text:span> i kliknąć <text:span text:style-name="T1">Execute</text:span> – może przy poprzednim razie nie wcisnąłeś trójkąta do końca.</text:p>
        <text:p text:style-name="Text_20_body">Daj znać, jak tylko zobaczysz <text:span text:style-name="Source_20_Text">HospitalDb</text:span> na liście! Wtedy zostaje już tylko ostatni krok – terminal i generowanie kodu (scaffold).</text:p>
      </text:section>
      <text:section text:style-name="Sect1" text:name="Sekcja22">
        <text:p text:style-name="P69"><text:bookmark text:name="1649ee72fc5953f9"/></text:p>
      </text:section>
      <text:section text:style-name="Sect1" text:name="2fe2bdb19f6ee587">
        <text:p text:style-name="P69"/>
      </text:section>
      <text:section text:style-name="Sect2" text:name="model-response-message-contentr_2fe2bdb19f6ee587">
        <text:p text:style-name="Text_20_body">Widzę, że nadal jesteś "wewnątrz" bazy <text:span text:style-name="Source_20_Text">master</text:span>. Wszystko jest w porządku, po prostu musimy sprawić, żeby baza <text:span text:style-name="Source_20_Text">HospitalDb</text:span> pojawiła się na liście.</text:p>
        <text:p text:style-name="Text_20_body">Zróbmy to jeszcze raz, bardzo dokładnie:</text:p>
        <text:list xml:id="list2464512329570798980" text:style-name="L36">
          <text:list-item>
            <text:p text:style-name="P38">Wpisz w konsoli (tym białym oknie) to polecenie:</text:p>
            <text:p text:style-name="P38">SQL</text:p>
          </text:list-item>
        </text:list>
      </text:section>
      <text:section text:style-name="Sect2" text:name="Sekcja23">
        <text:list xml:id="list382002692930881879" text:style-name="L37">
          <text:list-item>
            <text:p text:style-name="P2"><text:bookmark text:name="model-response-message-contentr_2fe2bdb19f6ee587"/><text:span text:style-name="Source_20_Text">CREATE DATABASE HospitalDb;</text:span></text:p>
          </text:list-item>
          <text:list-item>
            <text:p text:style-name="P39">Naciśnij zielony przycisk <text:span text:style-name="T1">Execute</text:span> (trójkąt).</text:p>
          </text:list-item>
          <text:list-item>
            <text:p text:style-name="P39"><text:span text:style-name="T1">Kluczowy moment:</text:span> Spójrz na panel <text:span text:style-name="T1">Database</text:span> po prawej stronie. Kliknij ikonę <text:span text:style-name="T1">Refresh</text:span> (strzałki w kółko) – to ta ikona tuż nad napisem <text:span text:style-name="Source_20_Text">master</text:span>.</text:p>
          </text:list-item>
        </text:list>
        <text:p text:style-name="Text_20_body"><text:span text:style-name="T1">Czy po kliknięciu Refresh, tuż pod napisem </text:span><text:span text:style-name="Source_20_Text"><text:span text:style-name="T1">master</text:span></text:span><text:span text:style-name="T1"> pojawił się napis </text:span><text:span text:style-name="Source_20_Text"><text:span text:style-name="T1">HospitalDb</text:span></text:span><text:span text:style-name="T1">?</text:span></text:p>
        <text:p text:style-name="Text_20_body">Jeśli tak:</text:p>
        <text:list xml:id="list6438317784970878071" text:style-name="L38">
          <text:list-item>
            <text:p text:style-name="P40">Kliknij na ten nowy napis <text:span text:style-name="Source_20_Text">HospitalDb</text:span>.</text:p>
          </text:list-item>
          <text:list-item>
            <text:p text:style-name="P40">Teraz na pasku narzędzi nad konsolą (tam, gdzie masz <text:span text:style-name="Source_20_Text">&lt;database&gt;</text:span>), rozwiń listę i <text:soft-page-break/>upewnij się, że jest tam wybrane <text:span text:style-name="Source_20_Text">HospitalDb</text:span>.</text:p>
          </text:list-item>
          <text:list-item>
            <text:p text:style-name="P40">Wtedy wklej skrypt <text:span text:style-name="Source_20_Text">create.sql</text:span> i kliknij <text:span text:style-name="T1">Execute</text:span>.</text:p>
          </text:list-item>
        </text:list>
        <text:p text:style-name="Text_20_body">Jeśli po kliknięciu <text:span text:style-name="T1">Refresh</text:span> nadal nie widzisz <text:span text:style-name="Source_20_Text">HospitalDb</text:span>, spróbuj jeszcze raz wykonać <text:span text:style-name="Source_20_Text">CREATE DATABASE HospitalDb;</text:span> w konsoli, ale upewnij się, że w pasku narzędzi nad konsolą (tam, gdzie masz <text:span text:style-name="Source_20_Text">&lt;database&gt;</text:span>) masz wybrane <text:span text:style-name="Source_20_Text">master</text:span> przed wykonaniem tej komendy.</text:p>
        <text:p text:style-name="Text_20_body">Daj znać, czy <text:span text:style-name="Source_20_Text">HospitalDb</text:span> już się pojawiło na liście! Kiedy to zrobimy, terminal do wygenerowania kodu (scaffold) zajmie nam dosłownie chwilę.</text:p>
      </text:section>
      <text:section text:style-name="Sect1" text:name="Sekcja24">
        <text:p text:style-name="P69"><text:bookmark text:name="2fe2bdb19f6ee587"/></text:p>
      </text:section>
      <text:section text:style-name="Sect1" text:name="38790e93e059f880">
        <text:p text:style-name="P69"/>
        <text:section text:style-name="Sect1" text:name="user-query-content-10">
          <text:p text:style-name="P69"/>
        </text:section>
      </text:section>
      <text:section text:style-name="Sect1" text:name="Sekcja25">
        <text:p text:style-name="P68"><text:bookmark text:name="user-query-content-10"/>cos kliknalem w srodku tam </text:p>
      </text:section>
      <text:section text:style-name="Sect2" text:name="model-response-message-contentr_38790e93e059f880">
        <text:p text:style-name="Text_20_body">Wszystko jest w porządku! Na tym zrzucie ekranu widać po prostu, że <text:span text:style-name="T1">połączyłeś się z serwerem SQL</text:span> i widzisz jego zawartość (bazy danych <text:span text:style-name="Source_20_Text">master</text:span>, <text:span text:style-name="Source_20_Text">model</text:span>, <text:span text:style-name="Source_20_Text">msdb</text:span>, <text:span text:style-name="Source_20_Text">tempdb</text:span>).</text:p>
        <text:p text:style-name="Text_20_body">To, że nie widzisz <text:span text:style-name="Source_20_Text">HospitalDb</text:span>, oznacza tylko tyle, że baza jeszcze nie istnieje. Teraz zróbmy to ostatecznie:</text:p>
        <text:list xml:id="list1102507285469847362" text:style-name="L39">
          <text:list-item>
            <text:p text:style-name="P41">W tym oknie konsoli (białe pole), które masz otwarte, wpisz dokładnie to:</text:p>
            <text:p text:style-name="P41">SQL</text:p>
          </text:list-item>
        </text:list>
      </text:section>
      <text:section text:style-name="Sect2" text:name="Sekcja26">
        <text:list xml:id="list2392617819204388973" text:style-name="L40">
          <text:list-item>
            <text:p text:style-name="P3"><text:bookmark text:name="model-response-message-contentr_38790e93e059f880"/><text:span text:style-name="Source_20_Text">CREATE DATABASE HospitalDb;</text:span></text:p>
          </text:list-item>
          <text:list-item>
            <text:p text:style-name="P42">Kliknij <text:span text:style-name="T1">zielony trójkąt (Execute)</text:span>.</text:p>
          </text:list-item>
          <text:list-item>
            <text:p text:style-name="P42"><text:span text:style-name="T1">Bardzo ważne:</text:span> Teraz w panelu <text:span text:style-name="Source_20_Text">Database</text:span> po prawej stronie, kliknij ikonę <text:span text:style-name="T1">Refresh</text:span> (strzałki w kółko) przy napisie <text:span text:style-name="Source_20_Text">Microsoft SQL Server</text:span>.</text:p>
          </text:list-item>
          <text:list-item>
            <text:p text:style-name="P42">Gdy <text:span text:style-name="Source_20_Text">HospitalDb</text:span> pojawi się na liście, kliknij na nie prawym przyciskiem myszy i wybierz <text:span text:style-name="T1">"Attach Console"</text:span> lub po prostu upewnij się, że w pasku nad konsolą (tam, gdzie masz <text:span text:style-name="Source_20_Text">&lt;database&gt;</text:span>) wybrane jest teraz <text:span text:style-name="Source_20_Text">HospitalDb</text:span>.</text:p>
          </text:list-item>
          <text:list-item>
            <text:p text:style-name="P42">Teraz, gdy konsola "rozmawia" z Twoją bazą <text:span text:style-name="Source_20_Text">HospitalDb</text:span>, wklej skrypt <text:span text:style-name="Source_20_Text">create.sql</text:span> i kliknij <text:span text:style-name="T1">Execute</text:span>.</text:p>
          </text:list-item>
        </text:list>
        <text:p text:style-name="Text_20_body"><text:span text:style-name="T1">Co dalej?</text:span> Jak tylko wykonasz skrypt, tabele wskoczą do bazy. Wtedy pozostanie ostatni, techniczny krok: otwarcie <text:span text:style-name="T1">Terminala</text:span> w Riderze i wklejenie komendy <text:span text:style-name="Source_20_Text">dotnet ef dbcontext scaffold...</text:span>, którą przygotowałem w poprzedniej wiadomości.</text:p>
        <text:p text:style-name="Text_20_body">Czy po kliknięciu <text:span text:style-name="Source_20_Text">Refresh</text:span> na połączeniu, baza <text:span text:style-name="Source_20_Text">HospitalDb</text:span> w końcu się pojawiła?</text:p>
      </text:section>
      <text:section text:style-name="Sect1" text:name="Sekcja27">
        <text:p text:style-name="P69"><text:bookmark text:name="38790e93e059f880"/></text:p>
      </text:section>
      <text:section text:style-name="Sect1" text:name="726b99a59c51da2b">
        <text:p text:style-name="P69"/>
        <text:section text:style-name="Sect1" text:name="user-query-content-11">
          <text:p text:style-name="P69"/>
        </text:section>
      </text:section>
      <text:section text:style-name="Sect1" text:name="Sekcja28">
        <text:p text:style-name="P68"><text:bookmark text:name="user-query-content-11"/>no jest nad masterem </text:p>
      </text:section>
      <text:section text:style-name="Sect2" text:name="model-response-message-contentr_726b99a59c51da2b">
        <text:p text:style-name="Text_20_body">To fantastycznie! Teraz, gdy <text:span text:style-name="Source_20_Text">HospitalDb</text:span> jest widoczne, musimy "przełączyć" Twoją konsolę na <text:soft-page-break/>tę bazę, żeby skrypt <text:span text:style-name="Source_20_Text">create.sql</text:span> wiedział, gdzie tworzyć tabele.</text:p>
        <text:h text:style-name="Heading_20_3" text:outline-level="3">Krok 1: Podłącz się do swojej bazy</text:h>
        <text:list xml:id="list1716891738147774326" text:style-name="L41">
          <text:list-item>
            <text:p text:style-name="P43">Spójrz na pasek narzędzi tuż nad dużym, białym oknem konsoli (tam, gdzie masz napis <text:span text:style-name="Source_20_Text">&lt;database&gt;</text:span> lub nazwę połączenia).</text:p>
          </text:list-item>
          <text:list-item>
            <text:p text:style-name="P43">Kliknij w ten napis i z rozwijanej listy <text:span text:style-name="T1">wybierz </text:span><text:span text:style-name="Source_20_Text"><text:span text:style-name="T1">HospitalDb</text:span></text:span>.</text:p>
          </text:list-item>
          <text:list-item>
            <text:p text:style-name="P43">Teraz, gdy wkleisz skrypt <text:span text:style-name="Source_20_Text">create.sql</text:span> i klikniesz <text:span text:style-name="T1">Execute</text:span> (zielony trójkąt), tabele zostaną utworzone w Twojej własnej bazie, a nie w <text:span text:style-name="Source_20_Text">master</text:span>.</text:p>
          </text:list-item>
        </text:list>
        <text:h text:style-name="Heading_20_3" text:outline-level="3">Krok 2: Generowanie modelu (Scaffold)</text:h>
        <text:p text:style-name="Text_20_body">Gdy tabele się utworzą, pora na ostatni, najważniejszy krok – zamianę bazy na kod C#.</text:p>
        <text:list xml:id="list4943116502490822333" text:style-name="L42">
          <text:list-item>
            <text:p text:style-name="P44">Otwórz <text:span text:style-name="T1">Terminal</text:span> w Riderze (zakładka na dole).</text:p>
          </text:list-item>
          <text:list-item>
            <text:p text:style-name="P44">Upewnij się, że jesteś w folderze z projektem (zazwyczaj jesteś tam automatycznie).</text:p>
          </text:list-item>
          <text:list-item>
            <text:p text:style-name="P44">Wklej poniższą komendę i naciśnij Enter:</text:p>
          </text:list-item>
        </text:list>
        <text:p text:style-name="P69">Bash</text:p>
      </text:section>
      <text:p text:style-name="P1"><text:span text:style-name="Source_20_Text">dotnet ef dbcontext scaffold "Data Source=(localdb)\MSSQLLocalDB;Initial Catalog=HospitalDb;Integrated Security=True;TrustServerCertificate=True" Microsoft.EntityFrameworkCore.SqlServer -o Models -c HospitalDbContext</text:span></text:p>
      <text:p text:style-name="P33">Co się teraz wydarzy?</text:p>
      <text:list xml:id="list4036026905298303447" text:style-name="L43">
        <text:list-item>
          <text:p text:style-name="P45"><text:bookmark text:name="p-rc_35a04cdda10125bc-66"/>EF Core połączy się z Twoją bazą <text:span text:style-name="Source_20_Text">HospitalDb</text:span>. </text:p>
        </text:list-item>
      </text:list>
      <text:list xml:id="list8662892602359142913" text:style-name="L45">
        <text:list-item>
          <text:p text:style-name="P46"><text:bookmark text:name="p-rc_35a04cdda10125bc-661"/><text:bookmark text:name="p-rc_35a04cdda10125bc-67"/>Przeanalizuje strukturę tabel. </text:p>
        </text:list-item>
      </text:list>
      <text:list xml:id="list7135071133354642405" text:style-name="L47">
        <text:list-item>
          <text:p text:style-name="P47"><text:bookmark text:name="p-rc_35a04cdda10125bc-671"/><text:bookmark text:name="p-rc_35a04cdda10125bc-68"/>Automatycznie stworzy w Twoim projekcie folder <text:span text:style-name="Source_20_Text">Models</text:span>. </text:p>
        </text:list-item>
      </text:list>
      <text:list xml:id="list3990477457839917199" text:style-name="L49">
        <text:list-item>
          <text:p text:style-name="P48"><text:bookmark text:name="p-rc_35a04cdda10125bc-681"/><text:bookmark text:name="p-rc_35a04cdda10125bc-69"/>W tym folderze znajdziesz klasę <text:span text:style-name="Source_20_Text">HospitalDbContext</text:span> (serce Twojej aplikacji) oraz pliki dla każdej tabeli (np. <text:span text:style-name="Source_20_Text">Patient.cs</text:span>, <text:span text:style-name="Source_20_Text">Ward.cs</text:span>). </text:p>
        </text:list-item>
      </text:list>
      <text:section text:style-name="Sect2" text:name="Sekcja29">
        <text:list xml:id="list1387873171622521352" text:style-name="L50">
          <text:list-item>
            <text:p text:style-name="P49"><text:bookmark text:name="model-response-message-contentr_726b99a59c51da2b"/><text:bookmark text:name="p-rc_35a04cdda10125bc-691"/></text:p>
          </text:list-item>
        </text:list>
        <text:p text:style-name="Text_20_body">Kiedy komenda się wykona, sprawdź w drzewku projektu po lewej stronie, czy pojawił się folder <text:span text:style-name="Source_20_Text">Models</text:span>. Jeśli tak – masz już fundamenty pod zadanie 2 i 3!</text:p>
        <text:p text:style-name="Text_20_body">Daj znać, czy folder <text:span text:style-name="Source_20_Text">Models</text:span> się pojawił – wtedy powiem Ci, jak najprościej napisać ten pierwszy endpoint <text:span text:style-name="Source_20_Text">GET /api/patients</text:span>.</text:p>
      </text:section>
      <text:section text:style-name="Sect1" text:name="Sekcja30">
        <text:p text:style-name="Text_20_body"><text:bookmark text:name="726b99a59c51da2b"/></text:p>
      </text:section>
      <text:section text:style-name="Sect1" text:name="17050b14fd64d6a4">
        <text:p text:style-name="Text_20_body"/>
        <text:section text:style-name="Sect1" text:name="user-query-content-12">
          <text:p text:style-name="Text_20_body"/>
        </text:section>
      </text:section>
      <text:section text:style-name="Sect1" text:name="Sekcja31">
        <text:p text:style-name="P68"><text:bookmark text:name="user-query-content-12"/>[2026-05-28 07:14:06] [S0001][5701] Changed database context to 'HospitalDb'. </text:p>
        <text:p text:style-name="P68">[2026-05-28 07:14:06] completed in 70 ms </text:p>
      </text:section>
      <text:section text:style-name="Sect2" text:name="model-response-message-contentr_17050b14fd64d6a4">
        <text:p text:style-name="Text_20_body"><text:bookmark text:name="p-rc_f87fb2a2cc1f45ba-89"/><text:soft-page-break/>Rewelacja! To oznacza, że Twoja baza <text:span text:style-name="Source_20_Text">HospitalDb</text:span> jest gotowa, aktywna i Rider ma z nią połączenie. </text:p>
      </text:section>
      <text:p text:style-name="Text_20_body"><text:bookmark text:name="p-rc_f87fb2a2cc1f45ba-891"/>Teraz wykonaj ostatni, najważniejszy techniczny krok: <text:span text:style-name="T1">Scaffolding</text:span>.</text:p>
      <text:list xml:id="list401117347356052324" text:style-name="L51">
        <text:list-item>
          <text:p text:style-name="P50"><text:bookmark text:name="p-rc_f87fb2a2cc1f45ba-90"/>Wklej ten skrypt <text:span text:style-name="Source_20_Text">create.sql</text:span> do konsoli (jeśli jeszcze tego nie zrobiłeś) i kliknij <text:span text:style-name="T1">Execute</text:span> (zielony trójkąt), aby utworzyć tabele w bazie. </text:p>
        </text:list-item>
      </text:list>
      <text:list xml:id="list6973770985378284482" text:style-name="L52">
        <text:list-item>
          <text:p text:style-name="P51"><text:bookmark text:name="p-rc_f87fb2a2cc1f45ba-901"/>Otwórz <text:span text:style-name="T1">Terminal</text:span> w Riderze (zakładka na dole).</text:p>
        </text:list-item>
        <text:list-item>
          <text:p text:style-name="P51">Wklej poniższą komendę i naciśnij <text:span text:style-name="T1">Enter</text:span>:</text:p>
        </text:list-item>
      </text:list>
      <text:p text:style-name="Text_20_body">Bash</text:p>
      <text:p text:style-name="P1"><text:span text:style-name="Source_20_Text">dotnet ef dbcontext scaffold "Data Source=(localdb)\MSSQLLocalDB;Initial Catalog=HospitalDb;Integrated Security=True;TrustServerCertificate=True" Microsoft.EntityFrameworkCore.SqlServer -o Models -c HospitalDbContext</text:span></text:p>
      <text:h text:style-name="Heading_20_3" text:outline-level="3">Co się teraz wydarzy?</text:h>
      <text:list xml:id="list3033620524873416749" text:style-name="L53">
        <text:list-item>
          <text:p text:style-name="P52"><text:bookmark text:name="p-rc_f87fb2a2cc1f45ba-91"/>Proces "scaffolding" połączy się z Twoją bazą <text:span text:style-name="Source_20_Text">HospitalDb</text:span>. </text:p>
        </text:list-item>
      </text:list>
      <text:list xml:id="list6889417370678567976" text:style-name="L55">
        <text:list-item>
          <text:p text:style-name="P53"><text:bookmark text:name="p-rc_f87fb2a2cc1f45ba-911"/><text:bookmark text:name="p-rc_f87fb2a2cc1f45ba-92"/>Na podstawie tabel (Patients, Admissions, Wards itd.) wygeneruje dla Ciebie klasy C# w folderze <text:span text:style-name="Source_20_Text">Models</text:span>. </text:p>
        </text:list-item>
      </text:list>
      <text:list xml:id="list4629619484663609086" text:style-name="L57">
        <text:list-item>
          <text:p text:style-name="P54"><text:bookmark text:name="p-rc_f87fb2a2cc1f45ba-921"/><text:bookmark text:name="p-rc_f87fb2a2cc1f45ba-93"/>Stworzy klasę <text:span text:style-name="Source_20_Text">HospitalDbContext</text:span>, która będzie Twoim "mostem" między kodem C# a bazą danych. </text:p>
        </text:list-item>
      </text:list>
      <text:section text:style-name="Sect2" text:name="Sekcja32">
        <text:list xml:id="list1487062039318502170" text:style-name="L58">
          <text:list-item>
            <text:p text:style-name="P55"><text:bookmark text:name="model-response-message-contentr_17050b14fd64d6a4"/><text:bookmark text:name="p-rc_f87fb2a2cc1f45ba-931"/></text:p>
          </text:list-item>
        </text:list>
        <text:p text:style-name="Text_20_body">Gdy terminal skończy pracę (zobaczysz komunikat "Build succeeded"), zajrzyj do drzewka projektu po lewej stronie – powinieneś zobaczyć tam nowy folder <text:span text:style-name="T1">Models</text:span>.</text:p>
        <text:p text:style-name="Text_20_body">Czy wygenerował się folder <text:span text:style-name="Source_20_Text">Models</text:span> z plikami typu <text:span text:style-name="Source_20_Text">Patient.cs</text:span> czy <text:span text:style-name="Source_20_Text">HospitalDbContext.cs</text:span>? Jeśli tak, to jesteś gotowy, by napisać pierwszy endpoint!</text:p>
      </text:section>
      <text:section text:style-name="Sect1" text:name="Sekcja33">
        <text:p text:style-name="Text_20_body"><text:bookmark text:name="17050b14fd64d6a4"/></text:p>
      </text:section>
      <text:section text:style-name="Sect1" text:name="5e392e63ab942cfd">
        <text:p text:style-name="Text_20_body"/>
        <text:section text:style-name="Sect1" text:name="user-query-content-13">
          <text:p text:style-name="Text_20_body"/>
        </text:section>
      </text:section>
      <text:section text:style-name="Sect1" text:name="Sekcja34">
        <text:p text:style-name="P68"><text:bookmark text:name="user-query-content-13"/>tak </text:p>
      </text:section>
      <text:section text:style-name="Sect2" text:name="model-response-message-contentr_5e392e63ab942cfd">
        <text:p text:style-name="Text_20_body"><text:bookmark text:name="p-rc_af9a7fcd62f9f853-103"/>Skoro folder <text:span text:style-name="Source_20_Text">Models</text:span> już istnieje, gratulacje! Właśnie wykonałeś najważniejszą pracę inżynieryjną: baza danych jest "rozmowna" z Twoim kodem C#. </text:p>
      </text:section>
      <text:p text:style-name="Text_20_body"><text:bookmark text:name="p-rc_af9a7fcd62f9f853-1031"/>Teraz, aby aplikacja działała, musisz wykonać dwa techniczne kroki, żeby zarejestrować bazę danych w projekcie:</text:p>
      <text:h text:style-name="Heading_20_3" text:outline-level="3">1. Rejestracja <text:span text:style-name="Source_20_Text">DbContext</text:span> w <text:span text:style-name="Source_20_Text">Program.cs</text:span></text:h>
      <text:p text:style-name="Text_20_body">Twój projekt musi wiedzieć, jak połączyć się z bazą podczas uruchamiania. Otwórz plik <text:span text:style-name="Source_20_Text">Program.cs</text:span> i przed linijką <text:span text:style-name="Source_20_Text">var app = builder.Build();</text:span> dodaj rejestrację swojego kontekstu:</text:p>
      <text:p text:style-name="Text_20_body"><text:soft-page-break/>C#</text:p>
      <text:p text:style-name="Preformatted_20_Text"><text:span text:style-name="Source_20_Text">// Wymagane użycie: using Microsoft.EntityFrameworkCore;</text:span></text:p>
      <text:p text:style-name="Preformatted_20_Text"><text:span text:style-name="Source_20_Text">// Wymagane użycie: using HospitalApp.Models; (podstaw nazwę swojego projektu)</text:span></text:p>
      <text:p text:style-name="Preformatted_20_Text"/>
      <text:p text:style-name="Preformatted_20_Text"><text:span text:style-name="Source_20_Text">builder.Services.AddDbContext&lt;HospitalDbContext&gt;(options =&gt;</text:span></text:p>
      <text:p text:style-name="P1"><text:span text:style-name="Source_20_Text"><text:s text:c="4"/>options.UseSqlServer("Data Source=(localdb)\\MSSQLLocalDB;Initial Catalog=HospitalDb;Integrated Security=True;TrustServerCertificate=True"));</text:span></text:p>
      <text:h text:style-name="Heading_20_3" text:outline-level="3">2. Przygotowanie kontrolera (Zadanie 2)</text:h>
      <text:p text:style-name="Text_20_body">Skoro masz już modele, utwórz nowy kontroler (np. <text:span text:style-name="Source_20_Text">PatientsController.cs</text:span>). Dzięki wstrzykiwaniu zależności (Dependency Injection), wstrzykniesz swój <text:span text:style-name="Source_20_Text">HospitalDbContext</text:span> do kontrolera:</text:p>
      <text:p text:style-name="Text_20_body">C#</text:p>
      <text:p text:style-name="Preformatted_20_Text"><text:span text:style-name="Source_20_Text">[Route("api/[controller]")]</text:span></text:p>
      <text:p text:style-name="Preformatted_20_Text"><text:span text:style-name="Source_20_Text">[ApiController]</text:span></text:p>
      <text:p text:style-name="Preformatted_20_Text"><text:span text:style-name="Source_20_Text">public class Patien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private readonly HospitalDbContext _context;</text:span></text:p>
      <text:p text:style-name="Preformatted_20_Text"/>
      <text:p text:style-name="Preformatted_20_Text"><text:span text:style-name="Source_20_Text"><text:s text:c="4"/>public PatientsController(HospitalDbContext contex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_context = contex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[HttpGet]</text:span></text:p>
      <text:p text:style-name="Preformatted_20_Text"><text:span text:style-name="Source_20_Text"><text:s text:c="4"/>public async Task&lt;IActionResult&gt; GetPatients([FromQuery] string? search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Tutaj wstawisz logikę pobierania pacjentów z uwzględnieniem filtra "search"</text:span></text:p>
      <text:p text:style-name="Preformatted_20_Text"><text:span text:style-name="Source_20_Text"><text:s text:c="8"/>// Pamiętaj o użyciu .Include(...) aby dołączyć Admissions i BedAssignments</text:span></text:p>
      <text:p text:style-name="Preformatted_20_Text"><text:span text:style-name="Source_20_Text"><text:s text:c="8"/>return Ok(await _context.Patients.ToListAsync()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Co jest teraz kluczowe do nauki?</text:h>
      <text:list xml:id="list2234858906173996881" text:style-name="L59">
        <text:list-item>
          <text:p text:style-name="P56"><text:span text:style-name="T1">LINQ:</text:span> To język, w którym będziesz pisać zapytania do bazy wewnątrz kontrolera (metody takie jak <text:span text:style-name="Source_20_Text">.Where</text:span>, <text:span text:style-name="Source_20_Text">.Include</text:span>, <text:span text:style-name="Source_20_Text">.Select</text:span>).</text:p>
        </text:list-item>
        <text:list-item>
          <text:p text:style-name="P56"><text:bookmark text:name="p-rc_af9a7fcd62f9f853-104"/><text:span text:style-name="T1">DTO (Data Transfer Objects):</text:span> Zauważ, że w <text:span text:style-name="Source_20_Text">GET.json</text:span> struktura jest ładnie uporządkowana. Często nie zwracamy bezpośrednio encji z bazy, ale tworzymy "czyste" klasy (DTO), żeby JSON wyglądał dokładnie tak, jak wymaga tego zadanie. </text:p>
        </text:list-item>
      </text:list>
      <text:section text:style-name="Sect2" text:name="Sekcja35">
        <text:list xml:id="list612083103578919818" text:style-name="L60">
          <text:list-item text:start-value="2">
            <text:p text:style-name="P57"><text:bookmark text:name="model-response-message-contentr_5e392e63ab942cfd"/><text:bookmark text:name="p-rc_af9a7fcd62f9f853-1041"/></text:p>
          </text:list-item>
        </text:list>
        <text:p text:style-name="Text_20_body">Czy chcesz, żebyśmy teraz wspólnie napisali logikę filtrowania w metodzie <text:span text:style-name="Source_20_Text">GetPatients</text:span> (Zadanie 2), czy wolisz najpierw wyjaśnić, jak dokładnie działa to wstrzykiwanie zależności w <text:span text:style-name="Source_20_Text">Program.cs</text:span>?</text:p>
      </text:section>
      <text:section text:style-name="Sect1" text:name="Sekcja36">
        <text:p text:style-name="Text_20_body"><text:bookmark text:name="5e392e63ab942cfd"/></text:p>
      </text:section>
      <text:section text:style-name="Sect1" text:name="d77ac392db65d1bc">
        <text:p text:style-name="Text_20_body"/>
        <text:section text:style-name="Sect1" text:name="user-query-content-14">
          <text:p text:style-name="Text_20_body"><text:soft-page-break/></text:p>
        </text:section>
      </text:section>
      <text:section text:style-name="Sect1" text:name="Sekcja37">
        <text:p text:style-name="P68"><text:bookmark text:name="user-query-content-14"/>przeprowadz przez te linq i dto </text:p>
      </text:section>
      <text:section text:style-name="Sect2" text:name="model-response-message-contentr_d77ac392db65d1bc">
        <text:p text:style-name="Text_20_body">Zrozumienie LINQ i DTO to klucz do sukcesu w Web API. Zamiast zwracać "surowe" dane z bazy (które często zawierają cykle, czyli np. Pacjent ma Przyjęcia, a Przyjęcie ma Pacjenta – co psuje JSON-a), tworzymy <text:span text:style-name="T1">DTO</text:span>, czyli płaskie klasy "do wyświetlenia".</text:p>
        <text:h text:style-name="Heading_20_3" text:outline-level="3">1. Tworzenie DTO (Data Transfer Objects)</text:h>
        <text:p text:style-name="Text_20_body">W folderze <text:span text:style-name="Source_20_Text">Models</text:span> (lub lepiej w nowym folderze <text:span text:style-name="Source_20_Text">DTOs</text:span>) stwórz klasy, które odzwierciedlają strukturę z pliku <text:span text:style-name="Source_20_Text">GET.json</text:span>.</text:p>
        <text:p text:style-name="Text_20_body">Przykład dla pacjenta:</text:p>
        <text:p text:style-name="P69">C#</text:p>
      </text:section>
      <text:p text:style-name="Preformatted_20_Text"><text:span text:style-name="Source_20_Text">public class PatientDto {</text:span></text:p>
      <text:p text:style-name="Preformatted_20_Text"><text:span text:style-name="Source_20_Text"><text:s text:c="4"/>public string Pesel { get; set; }</text:span></text:p>
      <text:p text:style-name="Preformatted_20_Text"><text:span text:style-name="Source_20_Text"><text:s text:c="4"/>public string FirstName { get; set; }</text:span></text:p>
      <text:p text:style-name="Preformatted_20_Text"><text:span text:style-name="Source_20_Text"><text:s text:c="4"/>public string LastName { get; set; }</text:span></text:p>
      <text:p text:style-name="Preformatted_20_Text"><text:span text:style-name="Source_20_Text"><text:s text:c="4"/>public int Age { get; set; }</text:span></text:p>
      <text:p text:style-name="Preformatted_20_Text"><text:span text:style-name="Source_20_Text"><text:s text:c="4"/>public string Sex { get; set; } // Tu zamienimy bit na "Male"/"Female"</text:span></text:p>
      <text:p text:style-name="Preformatted_20_Text"><text:span text:style-name="Source_20_Text"><text:s text:c="4"/>public List&lt;AdmissionDto&gt; Admissions { get; set; }</text:span></text:p>
      <text:p text:style-name="Preformatted_20_Text"><text:span text:style-name="Source_20_Text"><text:s text:c="4"/>// ... analogicznie dla BedAssignments</text:span></text:p>
      <text:p text:style-name="P1"><text:span text:style-name="Source_20_Text">}</text:span></text:p>
      <text:h text:style-name="Heading_20_3" text:outline-level="3">2. Logika LINQ z filtrowaniem (Zadanie 2)</text:h>
      <text:p text:style-name="Text_20_body">W kontrolerze używamy <text:span text:style-name="Source_20_Text">Include</text:span>, aby dociągnąć powiązane dane (tzw. Eager Loading), a potem <text:span text:style-name="Source_20_Text">Select</text:span>, aby "przepakować" je do DTO.</text:p>
      <text:p text:style-name="Text_20_body">Oto jak powinna wyglądać Twoja metoda w <text:span text:style-name="Source_20_Text">PatientsController</text:span>:</text:p>
      <text:p text:style-name="Text_20_body">C#</text:p>
      <text:p text:style-name="Preformatted_20_Text"><text:span text:style-name="Source_20_Text">[HttpGet]</text:span></text:p>
      <text:p text:style-name="Preformatted_20_Text"><text:span text:style-name="Source_20_Text">public async Task&lt;IActionResult&gt; GetPatients([FromQuery] string? search)</text:span></text:p>
      <text:p text:style-name="Preformatted_20_Text"><text:span text:style-name="Source_20_Text">{</text:span></text:p>
      <text:p text:style-name="Preformatted_20_Text"><text:span text:style-name="Source_20_Text"><text:s text:c="4"/>// 1. Zaczynamy od bazy</text:span></text:p>
      <text:p text:style-name="Preformatted_20_Text"><text:span text:style-name="Source_20_Text"><text:s text:c="4"/>var query = _context.Patients</text:span></text:p>
      <text:p text:style-name="Preformatted_20_Text"><text:span text:style-name="Source_20_Text"><text:s text:c="8"/>.Include(p =&gt; p.Admissions).ThenInclude(a =&gt; a.Ward)</text:span></text:p>
      <text:p text:style-name="Preformatted_20_Text"><text:span text:style-name="Source_20_Text"><text:s text:c="8"/>.Include(p =&gt; p.BedAssignments).ThenInclude(ba =&gt; ba.Bed).ThenInclude(b =&gt; b.BedType)</text:span></text:p>
      <text:p text:style-name="Preformatted_20_Text"><text:span text:style-name="Source_20_Text"><text:s text:c="8"/>.AsQueryable();</text:span></text:p>
      <text:p text:style-name="Preformatted_20_Text"/>
      <text:p text:style-name="Preformatted_20_Text"><text:span text:style-name="Source_20_Text"><text:s text:c="4"/>// 2. Filtrowanie (Zadanie 2 - instrukcja LIKE)</text:span></text:p>
      <text:p text:style-name="Preformatted_20_Text"><text:span text:style-name="Source_20_Text"><text:s text:c="4"/>if (!string.IsNullOrWhiteSpace(search)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query = query.Where(p =&gt; </text:span></text:p>
      <text:p text:style-name="Preformatted_20_Text"><text:span text:style-name="Source_20_Text"><text:s text:c="12"/>EF.Functions.Like(p.FirstName, $"%{search}%") || </text:span></text:p>
      <text:p text:style-name="Preformatted_20_Text"><text:span text:style-name="Source_20_Text"><text:s text:c="12"/>EF.Functions.Like(p.LastName, $"%{search}%")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3. Mapowanie na DTO za pomocą LINQ Select</text:span></text:p>
      <text:p text:style-name="Preformatted_20_Text"><text:span text:style-name="Source_20_Text"><text:s text:c="4"/>var result = await query.Select(p =&gt; new PatientDto {</text:span></text:p>
      <text:p text:style-name="Preformatted_20_Text"><text:span text:style-name="Source_20_Text"><text:s text:c="8"/>Pesel = p.Pesel,</text:span></text:p>
      <text:p text:style-name="Preformatted_20_Text"><text:span text:style-name="Source_20_Text"><text:s text:c="8"/>FirstName = p.FirstName,</text:span></text:p>
      <text:p text:style-name="Preformatted_20_Text"><text:span text:style-name="Source_20_Text"><text:s text:c="8"/>LastName = p.LastName,</text:span></text:p>
      <text:p text:style-name="Preformatted_20_Text"><text:soft-page-break/><text:span text:style-name="Source_20_Text"><text:s text:c="8"/>Age = p.Age,</text:span></text:p>
      <text:p text:style-name="Preformatted_20_Text"><text:span text:style-name="Source_20_Text"><text:s text:c="8"/>Sex = p.Sex ? "Male" : "Female", // Logika z Twojego zadania</text:span></text:p>
      <text:p text:style-name="Preformatted_20_Text"><text:span text:style-name="Source_20_Text"><text:s text:c="8"/>Admissions = p.Admissions.Select(a =&gt; new AdmissionDto {</text:span></text:p>
      <text:p text:style-name="Preformatted_20_Text"><text:span text:style-name="Source_20_Text"><text:s text:c="12"/>Id = a.Id,</text:span></text:p>
      <text:p text:style-name="Preformatted_20_Text"><text:span text:style-name="Source_20_Text"><text:s text:c="12"/>AdmissionDate = a.AdmissionDate,</text:span></text:p>
      <text:p text:style-name="Preformatted_20_Text"><text:span text:style-name="Source_20_Text"><text:s text:c="12"/>Ward = new WardDto { Name = a.Ward.Name, ... }</text:span></text:p>
      <text:p text:style-name="Preformatted_20_Text"><text:span text:style-name="Source_20_Text"><text:s text:c="8"/>}).ToList(),</text:span></text:p>
      <text:p text:style-name="Preformatted_20_Text"><text:span text:style-name="Source_20_Text"><text:s text:c="8"/>// ... reszta mapowania</text:span></text:p>
      <text:p text:style-name="Preformatted_20_Text"><text:span text:style-name="Source_20_Text"><text:s text:c="4"/>}).ToListAsync();</text:span></text:p>
      <text:p text:style-name="Preformatted_20_Text"/>
      <text:p text:style-name="Preformatted_20_Text"><text:span text:style-name="Source_20_Text"><text:s text:c="4"/>return Ok(result);</text:span></text:p>
      <text:p text:style-name="P1"><text:span text:style-name="Source_20_Text">}</text:span></text:p>
      <text:h text:style-name="Heading_20_3" text:outline-level="3">Dlaczego tak to robimy?</text:h>
      <text:list xml:id="list277684783395613080" text:style-name="L61">
        <text:list-item>
          <text:p text:style-name="P58"><text:span text:style-name="Source_20_Text"><text:span text:style-name="T1">Include(...)</text:span></text:span>: Bez tego EF Core nie pobierze powiązanych danych (np. nazwy oddziału) – otrzymasz <text:span text:style-name="Source_20_Text">null</text:span> w tych polach.</text:p>
        </text:list-item>
        <text:list-item>
          <text:p text:style-name="P58"><text:bookmark text:name="p-rc_63375d3ebddf69b7-109"/><text:span text:style-name="Source_20_Text"><text:span text:style-name="T1">EF.Functions.Like</text:span></text:span>: To sposób na użycie SQL-owego <text:span text:style-name="Source_20_Text">LIKE</text:span> wewnątrz C#. </text:p>
        </text:list-item>
      </text:list>
      <text:list xml:id="list2387335801829857255" text:style-name="L63">
        <text:list-item>
          <text:p text:style-name="P59"><text:bookmark text:name="p-rc_63375d3ebddf69b7-1091"/><text:bookmark text:name="p-rc_63375d3ebddf69b7-110"/><text:span text:style-name="Source_20_Text"><text:span text:style-name="T1">Select</text:span></text:span><text:span text:style-name="T1"> (Mapowanie)</text:span>: To najbezpieczniejszy sposób. Zamiast zwracać całą encję z bazy (która może być bardzo skomplikowana), wybierasz tylko te pola, których potrzebuje frontend. Dzięki temu format JSON będzie identyczny jak w pliku <text:span text:style-name="Source_20_Text">GET.json</text:span>. </text:p>
        </text:list-item>
      </text:list>
      <text:section text:style-name="Sect2" text:name="Sekcja38">
        <text:list xml:id="list249256345315248428" text:style-name="L64">
          <text:list-item text:start-value="3">
            <text:p text:style-name="P60"><text:bookmark text:name="model-response-message-contentr_d77ac392db65d1bc"/><text:bookmark text:name="p-rc_63375d3ebddf69b7-1101"/></text:p>
          </text:list-item>
        </text:list>
        <text:p text:style-name="Text_20_body"><text:span text:style-name="T1">Wskazówka na kolokwium:</text:span> Pamiętaj, aby zawsze używać <text:span text:style-name="Source_20_Text">.ToListAsync()</text:span> na końcu zapytania LINQ, żeby wykonać zapytanie do bazy asynchronicznie – to dobra praktyka w Web API.</text:p>
        <text:p text:style-name="Text_20_body">Czy ten schemat "Pobierz -&gt; Przefiltruj -&gt; Zmapuj na DTO" jest dla Ciebie jasny, czy chcesz, żebyśmy rozpisali dokładnie mapowanie dla <text:span text:style-name="Source_20_Text">BedAssignments</text:span>?</text:p>
      </text:section>
      <text:section text:style-name="Sect1" text:name="Sekcja39">
        <text:p text:style-name="Text_20_body"><text:bookmark text:name="d77ac392db65d1bc"/></text:p>
      </text:section>
      <text:section text:style-name="Sect1" text:name="a643cc87b7fbd788">
        <text:p text:style-name="Text_20_body"/>
        <text:section text:style-name="Sect1" text:name="user-query-content-15">
          <text:p text:style-name="Text_20_body"/>
        </text:section>
      </text:section>
      <text:section text:style-name="Sect1" text:name="Sekcja40">
        <text:p text:style-name="P68"><text:bookmark text:name="user-query-content-15"/>dobra, to teraz dokończ krok po kroku aby całe zadanie zrobić do końca dokładnie żebym miał na później do czytania w trakcie kolosa </text:p>
      </text:section>
      <text:section text:style-name="Sect2" text:name="model-response-message-contentr_a643cc87b7fbd788">
        <text:p text:style-name="Text_20_body">Jasne, przygotuję dla Ciebie kompletną, gotową "ściągę" krok po kroku. Dzięki temu będziesz miał wszystko w jednym miejscu, gotowe do przeanalizowania i wykorzystania na kolokwium.</text:p>
        <text:p text:style-name="Text_20_body">Podzielimy to na 3 logiczne etapy: utworzenie klas pomocniczych (DTO), napisanie Zadania 2 (GET) i napisanie Zadania 3 (POST).</text:p>
        <text:h text:style-name="Heading_20_3" text:outline-level="3">ETAP 1: Przygotowanie klas DTO (Data Transfer Objects)</text:h>
        <text:p text:style-name="Text_20_body"><text:bookmark text:name="p-rc_9cfea6c6037c3d84-121"/>Zanim napiszemy kontroler, musimy stworzyć klasy, które odzwierciedlają strukturę JSON z plików <text:span text:style-name="Source_20_Text">GET.json</text:span> i <text:span text:style-name="Source_20_Text">POST.json</text:span>. W Riderze utwórz w projekcie folder o nazwie <text:span text:style-name="Source_20_Text">DTOs</text:span> i dodaj do niego poniższe klasy. </text:p>
      </text:section>
      <text:p text:style-name="Text_20_body"><text:bookmark text:name="p-rc_9cfea6c6037c3d84-1211"/><text:bookmark text:name="p-rc_9cfea6c6037c3d84-122"/>1. Klasa do odbierania danych z żądania POST (Zadanie 3): </text:p>
      <text:p text:style-name="Text_20_body"><text:bookmark text:name="p-rc_9cfea6c6037c3d84-1221"/>C#</text:p>
      <text:p text:style-name="Preformatted_20_Text"><text:soft-page-break/><text:span text:style-name="Source_20_Text">public class AssignBedRequestDto</text:span></text:p>
      <text:p text:style-name="Preformatted_20_Text"><text:span text:style-name="Source_20_Text">{</text:span></text:p>
      <text:p text:style-name="Preformatted_20_Text"><text:span text:style-name="Source_20_Text"><text:s text:c="4"/>public DateTime From { get; set; }</text:span></text:p>
      <text:p text:style-name="Preformatted_20_Text"><text:span text:style-name="Source_20_Text"><text:s text:c="4"/>public DateTime? To { get; set; } // Znak zapytania, bo może być null</text:span></text:p>
      <text:p text:style-name="Preformatted_20_Text"><text:span text:style-name="Source_20_Text"><text:s text:c="4"/>public string BedType { get; set; } = string.Empty;</text:span></text:p>
      <text:p text:style-name="Preformatted_20_Text"><text:span text:style-name="Source_20_Text"><text:s text:c="4"/>public string Ward { get; set; } = string.Empty;</text:span></text:p>
      <text:p text:style-name="P1"><text:span text:style-name="Source_20_Text">}</text:span></text:p>
      <text:p text:style-name="Text_20_body"><text:bookmark text:name="p-rc_9cfea6c6037c3d84-123"/>2. Klasy do zwracania danych w żądaniu GET (Zadanie 2): Musimy odwzorować dokładnie tę strukturę, która jest w JSON. </text:p>
      <text:p text:style-name="Text_20_body"><text:bookmark text:name="p-rc_9cfea6c6037c3d84-1231"/>C#</text:p>
      <text:p text:style-name="Preformatted_20_Text"><text:span text:style-name="Source_20_Text">public class WardDto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ame { get; set; } = string.Empty;</text:span></text:p>
      <text:p text:style-name="Preformatted_20_Text"><text:span text:style-name="Source_20_Text"><text:s text:c="4"/>public string Description { get; set; } = string.Empty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BedTypeDto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ame { get; set; } = string.Empty;</text:span></text:p>
      <text:p text:style-name="Preformatted_20_Text"><text:span text:style-name="Source_20_Text"><text:s text:c="4"/>public string Description { get; set; } = string.Empty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RoomDto</text:span></text:p>
      <text:p text:style-name="Preformatted_20_Text"><text:span text:style-name="Source_20_Text">{</text:span></text:p>
      <text:p text:style-name="Preformatted_20_Text"><text:span text:style-name="Source_20_Text"><text:s text:c="4"/>public string Id { get; set; } = string.Empty;</text:span></text:p>
      <text:p text:style-name="Preformatted_20_Text"><text:span text:style-name="Source_20_Text"><text:s text:c="4"/>public bool HasTv { get; set; }</text:span></text:p>
      <text:p text:style-name="Preformatted_20_Text"><text:span text:style-name="Source_20_Text"><text:s text:c="4"/>public WardDto Ward { get; set; } = null!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BedDto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BedTypeDto BedType { get; set; } = null!;</text:span></text:p>
      <text:p text:style-name="Preformatted_20_Text"><text:span text:style-name="Source_20_Text"><text:s text:c="4"/>public RoomDto Room { get; set; } = null!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AdmissionDto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DateTime AdmissionDate { get; set; }</text:span></text:p>
      <text:p text:style-name="Preformatted_20_Text"><text:span text:style-name="Source_20_Text"><text:s text:c="4"/>public DateTime? DischargeDate { get; set; }</text:span></text:p>
      <text:p text:style-name="Preformatted_20_Text"><text:span text:style-name="Source_20_Text"><text:s text:c="4"/>public WardDto Ward { get; set; } = null!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BedAssignmentDto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DateTime From { get; set; }</text:span></text:p>
      <text:p text:style-name="Preformatted_20_Text"><text:span text:style-name="Source_20_Text"><text:s text:c="4"/>public DateTime? To { get; set; }</text:span></text:p>
      <text:p text:style-name="Preformatted_20_Text"><text:span text:style-name="Source_20_Text"><text:s text:c="4"/>public BedDto Bed { get; set; } = null!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atientDto</text:span></text:p>
      <text:p text:style-name="Preformatted_20_Text"><text:span text:style-name="Source_20_Text">{</text:span></text:p>
      <text:p text:style-name="Preformatted_20_Text"><text:span text:style-name="Source_20_Text"><text:s text:c="4"/>public string Pesel { get; set; } = string.Empty;</text:span></text:p>
      <text:p text:style-name="Preformatted_20_Text"><text:span text:style-name="Source_20_Text"><text:s text:c="4"/>public string FirstName { get; set; } = string.Empty;</text:span></text:p>
      <text:p text:style-name="Preformatted_20_Text"><text:span text:style-name="Source_20_Text"><text:s text:c="4"/>public string LastName { get; set; } = string.Empty;</text:span></text:p>
      <text:p text:style-name="Preformatted_20_Text"><text:span text:style-name="Source_20_Text"><text:s text:c="4"/>public int Age { get; set; }</text:span></text:p>
      <text:p text:style-name="Preformatted_20_Text"><text:soft-page-break/><text:span text:style-name="Source_20_Text"><text:s text:c="4"/>public string Sex { get; set; } = string.Empty; // Male lub Female</text:span></text:p>
      <text:p text:style-name="Preformatted_20_Text"><text:span text:style-name="Source_20_Text"><text:s text:c="4"/>public List&lt;AdmissionDto&gt; Admissions { get; set; } = new();</text:span></text:p>
      <text:p text:style-name="Preformatted_20_Text"><text:span text:style-name="Source_20_Text"><text:s text:c="4"/>public List&lt;BedAssignmentDto&gt; BedAssignments { get; set; } = new();</text:span></text:p>
      <text:p text:style-name="P1"><text:span text:style-name="Source_20_Text">}</text:span></text:p>
      <text:h text:style-name="Heading_20_3" text:outline-level="3">ETAP 2: Utworzenie Kontrolera i Zadanie 2 (GET /api/patients)</text:h>
      <text:p text:style-name="Text_20_body"><text:bookmark text:name="p-rc_9cfea6c6037c3d84-124"/>W folderze <text:span text:style-name="Source_20_Text">Controllers</text:span> utwórz nową klasę <text:span text:style-name="Source_20_Text">PatientsController.cs</text:span>. Wstrzykniemy do niej bazę danych i napiszemy metodę pobierającą pacjentów. </text:p>
      <text:p text:style-name="Text_20_body"><text:bookmark text:name="p-rc_9cfea6c6037c3d84-1241"/>C#</text:p>
      <text:p text:style-name="Preformatted_20_Text"><text:span text:style-name="Source_20_Text">using Microsoft.AspNetCore.Mvc;</text:span></text:p>
      <text:p text:style-name="Preformatted_20_Text"><text:span text:style-name="Source_20_Text">using Microsoft.EntityFrameworkCore;</text:span></text:p>
      <text:p text:style-name="Preformatted_20_Text"><text:span text:style-name="Source_20_Text">// Pamiętaj o dodaniu usingów do Twoich modeli i DTO, np:</text:span></text:p>
      <text:p text:style-name="Preformatted_20_Text"><text:span text:style-name="Source_20_Text">// using HospitalApp.Models;</text:span></text:p>
      <text:p text:style-name="Preformatted_20_Text"><text:span text:style-name="Source_20_Text">// using HospitalApp.DTOs;</text:span></text:p>
      <text:p text:style-name="Preformatted_20_Text"/>
      <text:p text:style-name="Preformatted_20_Text"><text:span text:style-name="Source_20_Text">[Route("api/[controller]")]</text:span></text:p>
      <text:p text:style-name="Preformatted_20_Text"><text:span text:style-name="Source_20_Text">[ApiController]</text:span></text:p>
      <text:p text:style-name="Preformatted_20_Text"><text:span text:style-name="Source_20_Text">public class Patien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private readonly HospitalDbContext _context;</text:span></text:p>
      <text:p text:style-name="Preformatted_20_Text"/>
      <text:p text:style-name="Preformatted_20_Text"><text:span text:style-name="Source_20_Text"><text:s text:c="4"/>// Wstrzykiwanie zależności - kontroler dostaje dostęp do bazy</text:span></text:p>
      <text:p text:style-name="Preformatted_20_Text"><text:span text:style-name="Source_20_Text"><text:s text:c="4"/>public PatientsController(HospitalDbContext contex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_context = contex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ZADANIE 2: Pobieranie pacjentów z opcjonalnym wyszukiwaniem</text:span></text:p>
      <text:p text:style-name="Preformatted_20_Text"><text:span text:style-name="Source_20_Text"><text:s text:c="4"/>[HttpGet]</text:span></text:p>
      <text:p text:style-name="Preformatted_20_Text"><text:span text:style-name="Source_20_Text"><text:s text:c="4"/>public async Task&lt;IActionResult&gt; GetPatients([FromQuery] string? search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1. Zaczynamy zapytanie (jeszcze nie wysyłamy go do bazy)</text:span></text:p>
      <text:p text:style-name="Preformatted_20_Text"><text:span text:style-name="Source_20_Text"><text:s text:c="8"/>var query = _context.Patients.AsQueryable();</text:span></text:p>
      <text:p text:style-name="Preformatted_20_Text"/>
      <text:p text:style-name="Preformatted_20_Text"><text:span text:style-name="Source_20_Text"><text:s text:c="8"/>[cite_start]// 2. Filtrowanie na podstawie parametru "search" z użyciem LIKE [cite: 50, 51, 57]</text:span></text:p>
      <text:p text:style-name="Preformatted_20_Text"><text:span text:style-name="Source_20_Text"><text:s text:c="8"/>if (!string.IsNullOrWhiteSpace(search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query = query.Where(p =&gt; </text:span></text:p>
      <text:p text:style-name="Preformatted_20_Text"><text:span text:style-name="Source_20_Text"><text:s text:c="16"/>EF.Functions.Like(p.FirstName, $"%{search}%") || </text:span></text:p>
      <text:p text:style-name="Preformatted_20_Text"><text:span text:style-name="Source_20_Text"><text:s text:c="16"/>EF.Functions.Like(p.LastName, $"%{search}%")</text:span></text:p>
      <text:p text:style-name="Preformatted_20_Text"><text:span text:style-name="Source_20_Text"><text:s text:c="12"/>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3. Mapowanie na DTO i pobranie z bazy (Select automatycznie zrobi Joiny pod spodem)</text:span></text:p>
      <text:p text:style-name="Preformatted_20_Text"><text:span text:style-name="Source_20_Text"><text:s text:c="8"/>var patients = await query.Select(p =&gt; new PatientDto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esel = p.Pesel,</text:span></text:p>
      <text:p text:style-name="Preformatted_20_Text"><text:span text:style-name="Source_20_Text"><text:s text:c="12"/>FirstName = p.FirstName,</text:span></text:p>
      <text:p text:style-name="Preformatted_20_Text"><text:span text:style-name="Source_20_Text"><text:s text:c="12"/>LastName = p.LastName,</text:span></text:p>
      <text:p text:style-name="Preformatted_20_Text"><text:span text:style-name="Source_20_Text"><text:s text:c="12"/>Age = p.Age,</text:span></text:p>
      <text:p text:style-name="Preformatted_20_Text"><text:span text:style-name="Source_20_Text"><text:s text:c="12"/>Sex = p.Sex ? "Male" : "Female", // bit 1 to Male, 0 to Female z zadania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Mapowanie zagnieżdżonych przyjęć</text:span></text:p>
      <text:p text:style-name="Preformatted_20_Text"><text:span text:style-name="Source_20_Text"><text:s text:c="12"/>Admissions = p.Admissions.Select(a =&gt; new AdmissionDto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d = a.Id,</text:span></text:p>
      <text:p text:style-name="Preformatted_20_Text"><text:soft-page-break/><text:span text:style-name="Source_20_Text"><text:s text:c="16"/>AdmissionDate = a.AdmissionDate,</text:span></text:p>
      <text:p text:style-name="Preformatted_20_Text"><text:span text:style-name="Source_20_Text"><text:s text:c="16"/>DischargeDate = a.DischargeDate,</text:span></text:p>
      <text:p text:style-name="Preformatted_20_Text"><text:span text:style-name="Source_20_Text"><text:s text:c="16"/>Ward = new WardDto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Id = a.Ward.Id,</text:span></text:p>
      <text:p text:style-name="Preformatted_20_Text"><text:span text:style-name="Source_20_Text"><text:s text:c="20"/>Name = a.Ward.Name,</text:span></text:p>
      <text:p text:style-name="Preformatted_20_Text"><text:span text:style-name="Source_20_Text"><text:s text:c="20"/>Description = a.Ward.Description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).ToList(),</text:span></text:p>
      <text:p text:style-name="Preformatted_20_Text"/>
      <text:p text:style-name="Preformatted_20_Text"><text:span text:style-name="Source_20_Text"><text:s text:c="12"/>// Mapowanie zagnieżdżonych przypisań łóżek</text:span></text:p>
      <text:p text:style-name="Preformatted_20_Text"><text:span text:style-name="Source_20_Text"><text:s text:c="12"/>BedAssignments = p.BedAssignments.Select(ba =&gt; new BedAssignmentDto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d = ba.Id,</text:span></text:p>
      <text:p text:style-name="Preformatted_20_Text"><text:span text:style-name="Source_20_Text"><text:s text:c="16"/>From = ba.From,</text:span></text:p>
      <text:p text:style-name="Preformatted_20_Text"><text:span text:style-name="Source_20_Text"><text:s text:c="16"/>To = ba.To,</text:span></text:p>
      <text:p text:style-name="Preformatted_20_Text"><text:span text:style-name="Source_20_Text"><text:s text:c="16"/>Bed = new BedDto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Id = ba.Bed.Id,</text:span></text:p>
      <text:p text:style-name="Preformatted_20_Text"><text:span text:style-name="Source_20_Text"><text:s text:c="20"/>BedType = new BedTypeDto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Id = ba.Bed.BedType.Id,</text:span></text:p>
      <text:p text:style-name="Preformatted_20_Text"><text:span text:style-name="Source_20_Text"><text:s text:c="24"/>Name = ba.Bed.BedType.Name,</text:span></text:p>
      <text:p text:style-name="Preformatted_20_Text"><text:span text:style-name="Source_20_Text"><text:s text:c="24"/>Description = ba.Bed.BedType.Description</text:span></text:p>
      <text:p text:style-name="Preformatted_20_Text"><text:span text:style-name="Source_20_Text"><text:s text:c="20"/>},</text:span></text:p>
      <text:p text:style-name="Preformatted_20_Text"><text:span text:style-name="Source_20_Text"><text:s text:c="20"/>Room = new RoomDto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Id = ba.Bed.Room.Id,</text:span></text:p>
      <text:p text:style-name="Preformatted_20_Text"><text:span text:style-name="Source_20_Text"><text:s text:c="24"/>HasTv = ba.Bed.Room.HasTv,</text:span></text:p>
      <text:p text:style-name="Preformatted_20_Text"><text:span text:style-name="Source_20_Text"><text:s text:c="24"/>Ward = new WardDto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Id = ba.Bed.Room.Ward.Id,</text:span></text:p>
      <text:p text:style-name="Preformatted_20_Text"><text:span text:style-name="Source_20_Text"><text:s text:c="28"/>Name = ba.Bed.Room.Ward.Name,</text:span></text:p>
      <text:p text:style-name="Preformatted_20_Text"><text:span text:style-name="Source_20_Text"><text:s text:c="28"/>Description = ba.Bed.Room.Ward.Description</text:span></text:p>
      <text:p text:style-name="Preformatted_20_Text"><text:span text:style-name="Source_20_Text"><text:s text:c="24"/>}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).ToList()</text:span></text:p>
      <text:p text:style-name="Preformatted_20_Text"><text:span text:style-name="Source_20_Text"><text:s text:c="8"/>}).ToListAsync();</text:span></text:p>
      <text:p text:style-name="Preformatted_20_Text"/>
      <text:p text:style-name="Preformatted_20_Text"><text:span text:style-name="Source_20_Text"><text:s text:c="8"/>return Ok(patients); // Zwraca HTTP 200 z listą JSON</text:span></text:p>
      <text:p text:style-name="P1"><text:span text:style-name="Source_20_Text"><text:s text:c="4"/>}</text:span></text:p>
      <text:h text:style-name="Heading_20_3" text:outline-level="3">ETAP 3: Zadanie 3 (POST /api/patients/{pesel}/bedassignments)</text:h>
      <text:p text:style-name="Text_20_body"><text:bookmark text:name="p-rc_9cfea6c6037c3d84-125"/>W tej samej klasie <text:span text:style-name="Source_20_Text">PatientsController</text:span> dopisujemy pod spodem drugą metodę. Musi ona sprawdzić dostępność łóżka na podstawie krzyżujących się dat. </text:p>
      <text:p text:style-name="Text_20_body"><text:bookmark text:name="p-rc_9cfea6c6037c3d84-1251"/>C#</text:p>
      <text:p text:style-name="Preformatted_20_Text"><text:span text:style-name="Source_20_Text"><text:s text:c="4"/>// ZADANIE 3: Przypisanie pacjentowi łóżka</text:span></text:p>
      <text:p text:style-name="Preformatted_20_Text"><text:span text:style-name="Source_20_Text"><text:s text:c="4"/>[HttpPost("{pesel}/bedassignments")]</text:span></text:p>
      <text:p text:style-name="Preformatted_20_Text"><text:span text:style-name="Source_20_Text"><text:s text:c="4"/>public async Task&lt;IActionResult&gt; AssignBed(string pesel, [FromBody] AssignBedRequestDto reques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1. Sprawdzamy, czy w ogóle istnieje taki pacjent (dobra praktyka)</text:span></text:p>
      <text:p text:style-name="Preformatted_20_Text"><text:span text:style-name="Source_20_Text"><text:s text:c="8"/>var patientExists = await _context.Patients.AnyAsync(p =&gt; p.Pesel == pesel);</text:span></text:p>
      <text:p text:style-name="Preformatted_20_Text"><text:span text:style-name="Source_20_Text"><text:s text:c="8"/>if (!patientExist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NotFound($"Pacjent o numerze PESEL {pesel} nie istnieje w bazie.");</text:span></text:p>
      <text:p text:style-name="Preformatted_20_Text"><text:soft-page-break/><text:span text:style-name="Source_20_Text"><text:s text:c="8"/>}</text:span></text:p>
      <text:p text:style-name="Preformatted_20_Text"/>
      <text:p text:style-name="Preformatted_20_Text"><text:span text:style-name="Source_20_Text"><text:s text:c="8"/>[cite_start]// 2. Szukamy odpowiedniego, WOLNEGO łóżka [cite: 61]</text:span></text:p>
      <text:p text:style-name="Preformatted_20_Text"><text:span text:style-name="Source_20_Text"><text:s text:c="8"/>// Łóżko jest wolne, jeśli NIE MA w systemie takiego BedAssignment dla tego łóżka,</text:span></text:p>
      <text:p text:style-name="Preformatted_20_Text"><text:span text:style-name="Source_20_Text"><text:s text:c="8"/>// którego ramy czasowe nakładają się na ramy czasowe z żądania.</text:span></text:p>
      <text:p text:style-name="Preformatted_20_Text"><text:span text:style-name="Source_20_Text"><text:s text:c="8"/>var availableBed = await _context.Beds</text:span></text:p>
      <text:p text:style-name="Preformatted_20_Text"><text:span text:style-name="Source_20_Text"><text:s text:c="12"/>.Where(b =&gt; b.BedType.Name == request.BedType &amp;&amp; b.Room.Ward.Name == request.Ward)</text:span></text:p>
      <text:p text:style-name="Preformatted_20_Text"><text:span text:style-name="Source_20_Text"><text:s text:c="12"/>.Where(b =&gt; !b.BedAssignments.Any(existingAssignment =&gt; </text:span></text:p>
      <text:p text:style-name="Preformatted_20_Text"><text:span text:style-name="Source_20_Text"><text:s text:c="16"/>// Logika nakładania się dat (overlap)</text:span></text:p>
      <text:p text:style-name="Preformatted_20_Text"><text:span text:style-name="Source_20_Text"><text:s text:c="16"/>(request.To == null || existingAssignment.From &lt; request.To) &amp;&amp;</text:span></text:p>
      <text:p text:style-name="Preformatted_20_Text"><text:span text:style-name="Source_20_Text"><text:s text:c="16"/>(existingAssignment.To == null || existingAssignment.To &gt; request.From)</text:span></text:p>
      <text:p text:style-name="Preformatted_20_Text"><text:span text:style-name="Source_20_Text"><text:s text:c="12"/>))</text:span></text:p>
      <text:p text:style-name="Preformatted_20_Text"><text:span text:style-name="Source_20_Text"><text:s text:c="12"/>.FirstOrDefaultAsync(); // Pobiera pierwsze znalezione wolne łóżko</text:span></text:p>
      <text:p text:style-name="Preformatted_20_Text"/>
      <text:p text:style-name="Preformatted_20_Text"><text:span text:style-name="Source_20_Text"><text:s text:c="8"/>[cite_start]// 3. Reakcja na brak łóżka [cite: 62]</text:span></text:p>
      <text:p text:style-name="Preformatted_20_Text"><text:span text:style-name="Source_20_Text"><text:s text:c="8"/>if (availableBed == null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StatusCode(404, "Nie znaleziono wolnego łóżka o zadanym typie, na wskazanym oddziale, we wskazanym okresie czasu.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4. Tworzenie nowego przypisania</text:span></text:p>
      <text:p text:style-name="Preformatted_20_Text"><text:span text:style-name="Source_20_Text"><text:s text:c="8"/>var newAssignment = new BedAssignment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atientPesel = pesel,</text:span></text:p>
      <text:p text:style-name="Preformatted_20_Text"><text:span text:style-name="Source_20_Text"><text:s text:c="12"/>BedId = availableBed.Id,</text:span></text:p>
      <text:p text:style-name="Preformatted_20_Text"><text:span text:style-name="Source_20_Text"><text:s text:c="12"/>From = request.From,</text:span></text:p>
      <text:p text:style-name="Preformatted_20_Text"><text:span text:style-name="Source_20_Text"><text:s text:c="12"/>To = request.To</text:span></text:p>
      <text:p text:style-name="Preformatted_20_Text"><text:span text:style-name="Source_20_Text"><text:s text:c="8"/>};</text:span></text:p>
      <text:p text:style-name="Preformatted_20_Text"/>
      <text:p text:style-name="Preformatted_20_Text"><text:span text:style-name="Source_20_Text"><text:s text:c="8"/>// 5. Zapisanie do bazy</text:span></text:p>
      <text:p text:style-name="Preformatted_20_Text"><text:span text:style-name="Source_20_Text"><text:s text:c="8"/>_context.BedAssignments.Add(newAssignment);</text:span></text:p>
      <text:p text:style-name="Preformatted_20_Text"><text:span text:style-name="Source_20_Text"><text:s text:c="8"/>await _context.SaveChangesAsync();</text:span></text:p>
      <text:p text:style-name="Preformatted_20_Text"/>
      <text:p text:style-name="Preformatted_20_Text"><text:span text:style-name="Source_20_Text"><text:s text:c="8"/>return Created("", new { Message = "Łóżko zostało pomyślnie przypisane.", AssignmentId = newAssignment.Id }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ETAP 4: Rejestracja bazy w <text:span text:style-name="Source_20_Text">Program.cs</text:span> (Aby wszystko działało)</text:h>
      <text:p text:style-name="Text_20_body">Na koniec musisz upewnić się, że aplikacja potrafi połączyć się z Twoją bazą przy starcie. Otwórz plik <text:span text:style-name="Source_20_Text">Program.cs</text:span> i dodaj te linijki:</text:p>
      <text:p text:style-name="P69">C#</text:p>
      <text:section text:style-name="Sect2" text:name="Sekcja41">
        <text:p text:style-name="Preformatted_20_Text"><text:bookmark text:name="model-response-message-contentr_a643cc87b7fbd788"/><text:span text:style-name="Source_20_Text">using Microsoft.EntityFrameworkCore;</text:span></text:p>
        <text:p text:style-name="Preformatted_20_Text"><text:span text:style-name="Source_20_Text">// Pamiętaj o użyciu folderu z Twoimi modelami: using HospitalApp.Models;</text:span></text:p>
        <text:p text:style-name="Preformatted_20_Text"/>
        <text:p text:style-name="Preformatted_20_Text"><text:span text:style-name="Source_20_Text">var builder = WebApplication.CreateBuilder(args);</text:span></text:p>
        <text:p text:style-name="Preformatted_20_Text"/>
        <text:p text:style-name="Preformatted_20_Text"><text:span text:style-name="Source_20_Text">// Dodaj kontrolery (żeby API działało)</text:span></text:p>
        <text:p text:style-name="Preformatted_20_Text"><text:span text:style-name="Source_20_Text">builder.Services.AddControllers();</text:span></text:p>
        <text:p text:style-name="Preformatted_20_Text"/>
        <text:p text:style-name="Preformatted_20_Text"><text:span text:style-name="Source_20_Text">// Rejestracja Swaggera (dokumentacji ułatwiającej testowanie)</text:span></text:p>
        <text:p text:style-name="Preformatted_20_Text"><text:span text:style-name="Source_20_Text">builder.Services.AddEndpointsApiExplorer();</text:span></text:p>
        <text:p text:style-name="Preformatted_20_Text"><text:span text:style-name="Source_20_Text">builder.Services.AddSwaggerGen();</text:span></text:p>
        <text:p text:style-name="Preformatted_20_Text"/>
        <text:p text:style-name="Preformatted_20_Text"><text:span text:style-name="Source_20_Text">// TĘ LINIJKĘ MUSISZ DODAĆ - REJESTRACJA BAZY DANYCH</text:span></text:p>
        <text:p text:style-name="Preformatted_20_Text"><text:span text:style-name="Source_20_Text">builder.Services.AddDbContext&lt;HospitalDbContext&gt;(options =&gt;</text:span></text:p>
        <text:p text:style-name="Preformatted_20_Text"><text:soft-page-break/><text:span text:style-name="Source_20_Text"><text:s text:c="4"/>options.UseSqlServer("Data Source=(localdb)\\MSSQLLocalDB;Initial Catalog=HospitalDb;Integrated Security=True;TrustServerCertificate=True"));</text:span></text:p>
        <text:p text:style-name="Preformatted_20_Text"/>
        <text:p text:style-name="Preformatted_20_Text"><text:span text:style-name="Source_20_Text">// Włączamy to, co zablokowałoby zapętlanie się JSONa (opcjonalne, ale przydatne w EF Core)</text:span></text:p>
        <text:p text:style-name="Preformatted_20_Text"><text:span text:style-name="Source_20_Text">builder.Services.AddControllers().AddJsonOptions(options =&gt;</text:span></text:p>
        <text:p text:style-name="Preformatted_20_Text"><text:span text:style-name="Source_20_Text">{</text:span></text:p>
        <text:p text:style-name="Preformatted_20_Text"><text:span text:style-name="Source_20_Text"><text:s text:c="4"/>options.JsonSerializerOptions.ReferenceHandler = System.Text.Json.Serialization.ReferenceHandler.IgnoreCycles;</text:span></text:p>
        <text:p text:style-name="Preformatted_20_Text"><text:span text:style-name="Source_20_Text">});</text:span></text:p>
        <text:p text:style-name="Preformatted_20_Text"/>
        <text:p text:style-name="Preformatted_20_Text"><text:span text:style-name="Source_20_Text">var app = builder.Build();</text:span></text:p>
        <text:p text:style-name="Preformatted_20_Text"/>
        <text:p text:style-name="Preformatted_20_Text"><text:span text:style-name="Source_20_Text">if (app.Environment.IsDevelopment())</text:span></text:p>
        <text:p text:style-name="Preformatted_20_Text"><text:span text:style-name="Source_20_Text">{</text:span></text:p>
        <text:p text:style-name="Preformatted_20_Text"><text:span text:style-name="Source_20_Text"><text:s text:c="4"/>app.UseSwagger();</text:span></text:p>
        <text:p text:style-name="Preformatted_20_Text"><text:span text:style-name="Source_20_Text"><text:s text:c="4"/>app.UseSwaggerUI(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app.MapControllers();</text:span></text:p>
        <text:p text:style-name="Preformatted_20_Text"/>
        <text:p text:style-name="P1"><text:span text:style-name="Source_20_Text">app.Run();</text:span></text:p>
      </text:section>
      <text:section text:style-name="Sect1" text:name="Sekcja42">
        <text:p text:style-name="P69"><text:bookmark text:name="a643cc87b7fbd788"/></text:p>
      </text:section>
      <text:section text:style-name="Sect1" text:name="4f7a1c9b3f00aa3e">
        <text:p text:style-name="P69"/>
        <text:section text:style-name="Sect1" text:name="user-query-content-16">
          <text:p text:style-name="P69"/>
        </text:section>
      </text:section>
      <text:p text:style-name="P68">a co w appsettings? daj jakis szablon oraz co w program.cs, na razie mam to: using HospitalApp.Models; </text:p>
      <text:p text:style-name="P68">using Microsoft.AspNetCore.Mvc; </text:p>
      <text:p text:style-name="P68">using Microsoft.EntityFrameworkCore; </text:p>
      <text:p text:style-name="P68"/>
      <text:p text:style-name="P68">namespace HospitalApp.Controllers; </text:p>
      <text:p text:style-name="P68">[Route("api/[controller]")] </text:p>
      <text:p text:style-name="P68">[ApiController] </text:p>
      <text:p text:style-name="P68">public class PatientsController : ControllerBase </text:p>
      <text:p text:style-name="P68">{ </text:p>
      <text:p text:style-name="P68">private readonly HospitalDbContext _context; </text:p>
      <text:p text:style-name="P68"/>
      <text:p text:style-name="P68">public PatientsController(HospitalDbContext context) </text:p>
      <text:p text:style-name="P68">{ </text:p>
      <text:p text:style-name="P68">_context = context; </text:p>
      <text:p text:style-name="P68">} </text:p>
      <text:p text:style-name="P68"/>
      <text:p text:style-name="P68">[HttpGet] </text:p>
      <text:p text:style-name="P68"><text:soft-page-break/>public async Task&lt;IActionResult&gt; GetPatients([FromQuery] string? search) </text:p>
      <text:p text:style-name="P68">{ </text:p>
      <text:p text:style-name="P68">// Tutaj wstawisz logikę pobierania pacjentów z uwzględnieniem filtra "search" </text:p>
      <text:p text:style-name="P68">// Pamiętaj o użyciu .Include(...) aby dołączyć Admissions i BedAssignments </text:p>
      <text:p text:style-name="P68">return Ok(await _context.Patients.ToListAsync()); </text:p>
      <text:p text:style-name="P68">} </text:p>
      <text:p text:style-name="P68">} </text:p>
      <text:section text:style-name="Sect1" text:name="Sekcja43">
        <text:p text:style-name="Text_20_body"><text:bookmark text:name="user-query-content-16"/></text:p>
      </text:section>
      <text:section text:style-name="Sect2" text:name="model-response-message-contentr_4f7a1c9b3f00aa3e">
        <text:p text:style-name="Text_20_body">Bardzo słuszna uwaga! Profesjonalne podejście polega na tym, żeby nie wpisywać tzw. "Connection Stringa" (czyli ścieżki do bazy danych) na sztywno w kodzie C#, tylko trzymać go właśnie w pliku konfiguracyjnym <text:span text:style-name="Source_20_Text">appsettings.json</text:span>.</text:p>
        <text:p text:style-name="Text_20_body">Oto gotowe szablony dla obu plików, krok po kroku.</text:p>
        <text:h text:style-name="Heading_20_3" text:outline-level="3">1. <text:span text:style-name="Source_20_Text">appsettings.json</text:span></text:h>
        <text:p text:style-name="Text_20_body">Otwórz ten plik (znajdziesz go w głównym drzewku projektu). Domyślnie ma tam tylko sekcje <text:span text:style-name="Source_20_Text">Logging</text:span> i <text:span text:style-name="Source_20_Text">AllowedHosts</text:span>. Musisz dodać nową sekcję <text:span text:style-name="Source_20_Text"><text:span text:style-name="T1">ConnectionStrings</text:span></text:span>.</text:p>
        <text:p text:style-name="Text_20_body">Twój cały plik <text:span text:style-name="Source_20_Text">appsettings.json</text:span> powinien wyglądać tak:</text:p>
        <text:p text:style-name="P69">JSON</text:p>
      </text:section>
      <text:p text:style-name="Preformatted_20_Text"><text:span text:style-name="Source_20_Text">{</text:span></text:p>
      <text:p text:style-name="Preformatted_20_Text"><text:span text:style-name="Source_20_Text"><text:s text:c="2"/>"Logging": {</text:span></text:p>
      <text:p text:style-name="Preformatted_20_Text"><text:span text:style-name="Source_20_Text"><text:s text:c="4"/>"LogLevel": {</text:span></text:p>
      <text:p text:style-name="Preformatted_20_Text"><text:span text:style-name="Source_20_Text"><text:s text:c="6"/>"Default": "Information",</text:span></text:p>
      <text:p text:style-name="Preformatted_20_Text"><text:span text:style-name="Source_20_Text"><text:s text:c="6"/>"Microsoft.AspNetCore": "Warning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llowedHosts": "*",</text:span></text:p>
      <text:p text:style-name="Preformatted_20_Text"><text:span text:style-name="Source_20_Text"><text:s text:c="2"/>"ConnectionStrings": {</text:span></text:p>
      <text:p text:style-name="Preformatted_20_Text"><text:span text:style-name="Source_20_Text"><text:s text:c="4"/>"DefaultConnection": "Data Source=(localdb)\\MSSQLLocalDB;Initial Catalog=HospitalDb;Integrated Security=True;TrustServerCertificate=True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T1">Co to robi?</text:span> Przechowuje bezpiecznie adres do Twojej bazy pod nazwą <text:span text:style-name="Source_20_Text">DefaultConnection</text:span>. Zauważ, że w JSONie musimy użyć podwójnego ukośnika <text:span text:style-name="Source_20_Text">\\</text:span> w ścieżce.</text:p>
      <text:h text:style-name="Heading_20_3" text:outline-level="3">2. <text:span text:style-name="Source_20_Text">Program.cs</text:span></text:h>
      <text:p text:style-name="Text_20_body">Teraz musimy powiedzieć Twojej aplikacji, żeby podczas startu zajrzała do <text:span text:style-name="Source_20_Text">appsettings.json</text:span>, pobrała stamtąd ten adres i podpięła go pod wygenerowany wcześniej <text:span text:style-name="Source_20_Text">HospitalDbContext</text:span>.</text:p>
      <text:p text:style-name="Text_20_body">Zastąp całą zawartość swojego pliku <text:span text:style-name="Source_20_Text">Program.cs</text:span> tym kodem (upewnij się tylko, że <text:span text:style-name="Source_20_Text">using HospitalApp.Models;</text:span> pasuje do nazwy Twojego projektu – jeśli Twój projekt nazywa się inaczej, zmień to słowo):</text:p>
      <text:p text:style-name="Text_20_body"><text:soft-page-break/>C#</text:p>
      <text:p text:style-name="Preformatted_20_Text"><text:span text:style-name="Source_20_Text">using HospitalApp.Models; // &lt;-- Podmień 'HospitalApp' jeśli twój projekt nazywa się inaczej</text:span></text:p>
      <text:p text:style-name="Preformatted_20_Text"><text:span text:style-name="Source_20_Text">using Microsoft.EntityFrameworkCore;</text:span></text:p>
      <text:p text:style-name="Preformatted_20_Text"/>
      <text:p text:style-name="Preformatted_20_Text"><text:span text:style-name="Source_20_Text">var builder = WebApplication.CreateBuilder(args);</text:span></text:p>
      <text:p text:style-name="Preformatted_20_Text"/>
      <text:p text:style-name="Preformatted_20_Text"><text:span text:style-name="Source_20_Text">// 1. Dodanie obsługi kontrolerów</text:span></text:p>
      <text:p text:style-name="Preformatted_20_Text"><text:span text:style-name="Source_20_Text">builder.Services.AddControllers();</text:span></text:p>
      <text:p text:style-name="Preformatted_20_Text"/>
      <text:p text:style-name="Preformatted_20_Text"><text:span text:style-name="Source_20_Text">// 2. Dodanie Swaggera (świetne narzędzie do testowania API w przeglądarce)</text:span></text:p>
      <text:p text:style-name="Preformatted_20_Text"><text:span text:style-name="Source_20_Text">builder.Services.AddEndpointsApiExplorer();</text:span></text:p>
      <text:p text:style-name="Preformatted_20_Text"><text:span text:style-name="Source_20_Text">builder.Services.AddSwaggerGen();</text:span></text:p>
      <text:p text:style-name="Preformatted_20_Text"/>
      <text:p text:style-name="Preformatted_20_Text"><text:span text:style-name="Source_20_Text">// 3. Odczytanie ścieżki do bazy z pliku appsettings.json</text:span></text:p>
      <text:p text:style-name="Preformatted_20_Text"><text:span text:style-name="Source_20_Text">var connectionString = builder.Configuration.GetConnectionString("DefaultConnection");</text:span></text:p>
      <text:p text:style-name="Preformatted_20_Text"/>
      <text:p text:style-name="Preformatted_20_Text"><text:span text:style-name="Source_20_Text">// 4. Rejestracja Twojej bazy danych w systemie (Dependency Injection)</text:span></text:p>
      <text:p text:style-name="Preformatted_20_Text"><text:span text:style-name="Source_20_Text">builder.Services.AddDbContext&lt;HospitalDbContext&gt;(options =&gt;</text:span></text:p>
      <text:p text:style-name="Preformatted_20_Text"><text:span text:style-name="Source_20_Text"><text:s text:c="4"/>options.UseSqlServer(connectionString));</text:span></text:p>
      <text:p text:style-name="Preformatted_20_Text"/>
      <text:p text:style-name="Preformatted_20_Text"><text:span text:style-name="Source_20_Text">var app = builder.Build();</text:span></text:p>
      <text:p text:style-name="Preformatted_20_Text"/>
      <text:p text:style-name="Preformatted_20_Text"><text:span text:style-name="Source_20_Text">// 5. Konfiguracja środowiska (uruchamianie Swaggera itp.)</text:span></text:p>
      <text:p text:style-name="Preformatted_20_Text"><text:span text:style-name="Source_20_Text">if (app.Environment.IsDevelopment())</text:span></text:p>
      <text:p text:style-name="Preformatted_20_Text"><text:span text:style-name="Source_20_Text">{</text:span></text:p>
      <text:p text:style-name="Preformatted_20_Text"><text:span text:style-name="Source_20_Text"><text:s text:c="4"/>app.UseSwagger();</text:span></text:p>
      <text:p text:style-name="Preformatted_20_Text"><text:span text:style-name="Source_20_Text"><text:s text:c="4"/>app.UseSwaggerUI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app.UseHttpsRedirection();</text:span></text:p>
      <text:p text:style-name="Preformatted_20_Text"><text:span text:style-name="Source_20_Text">app.MapControllers(); // Uruchamia mapowanie Twoich endpointów</text:span></text:p>
      <text:p text:style-name="Preformatted_20_Text"/>
      <text:p text:style-name="P1"><text:span text:style-name="Source_20_Text">app.Run();</text:span></text:p>
      <text:h text:style-name="Heading_20_3" text:outline-level="3">Krótka uwaga co do Twojego Kontrolera</text:h>
      <text:p text:style-name="Text_20_body">Kod kontrolera, który wkleiłeś:</text:p>
      <text:p text:style-name="Text_20_body">C#</text:p>
      <text:p text:style-name="P1"><text:span text:style-name="Source_20_Text">return Ok(await _context.Patients.ToListAsync());</text:span></text:p>
      <text:p text:style-name="Text_20_body"><text:bookmark text:name="p-rc_a011024e00e109a5-130"/>Zadziała i zwróci dane z bazy, ale zwróci <text:span text:style-name="T1">tylko same podstawowe informacje o pacjentach</text:span> (bez przypisanych łóżek i oddziałów), ponieważ brakuje instrukcji <text:span text:style-name="Source_20_Text">.Include(...)</text:span> oraz nie filtruje on po opcjonalnym parametrze <text:span text:style-name="Source_20_Text">search</text:span>. Będzie też powodował błędy związane z pętlami referencyjnymi (pacjent ma wizytę, wizyta ma pacjenta itp.). </text:p>
      <text:p text:style-name="Text_20_body"><text:bookmark text:name="p-rc_a011024e00e109a5-1301"/><text:bookmark text:name="p-rc_a011024e00e109a5-131"/>Kiedy już sprawdzisz, że projekt się odpala (dzięki powyższemu <text:span text:style-name="Source_20_Text">Program.cs</text:span>), <text:span text:style-name="T1">podmień zawartość tego kontrolera na kod z mojego poprzedniego posta z ETAPU 2</text:span>, w którym użyliśmy zapytań LINQ z mapowaniem na DTO. Wtedy format wyjściowy będzie w 100% zgodny z wymaganiami zadania (plik <text:span text:style-name="Source_20_Text">GET.json</text:span>). </text:p>
      <text:section text:style-name="Sect2" text:name="Sekcja44">
        <text:p text:style-name="Text_20_body"><text:bookmark text:name="model-response-message-contentr_4f7a1c9b3f00aa3e"/><text:bookmark text:name="p-rc_a011024e00e109a5-1311"/></text:p>
      </text:section>
      <text:section text:style-name="Sect1" text:name="Sekcja45">
        <text:p text:style-name="Text_20_body"><text:bookmark text:name="4f7a1c9b3f00aa3e"/></text:p>
      </text:section>
      <text:section text:style-name="Sect1" text:name="deb17ee6e7b37397">
        <text:p text:style-name="Text_20_body"><text:soft-page-break/></text:p>
        <text:section text:style-name="Sect1" text:name="user-query-content-17">
          <text:p text:style-name="Text_20_body"/>
        </text:section>
      </text:section>
      <text:section text:style-name="Sect1" text:name="Sekcja46">
        <text:p text:style-name="P68"><text:bookmark text:name="user-query-content-17"/>a w przypadku pisania na kolosie zamieniam wszedzie stringa na Data Source=(localdb)\MSSQLLocalDB;Initial Catalog=master;Integrated Security=True;? w ładowaniu bazy danych tez daje to? </text:p>
      </text:section>
      <text:section text:style-name="Sect2" text:name="model-response-message-contentr_deb17ee6e7b37397">
        <text:p text:style-name="Text_20_body">Tak, dokładnie! Rozumiesz to bezbłędnie. Jeśli na kolokwium masz odgórny wymóg korzystania z systemowej bazy, to ten jeden konkretny Connection String staje się Twoim głównym kluczem do całego zadania.</text:p>
        <text:p text:style-name="Text_20_body">Musisz go podmienić dokładnie w <text:span text:style-name="T1">trzech miejscach</text:span>, o których rozmawialiśmy. Oto krótka "ściąga na kolosa", jak to ogarnąć:</text:p>
        <text:h text:style-name="Heading_20_3" text:outline-level="3">1. Wgrywanie bazy (Konsola SQL w Riderze)</text:h>
        <text:p text:style-name="Text_20_body">Na kolokwium <text:span text:style-name="T1">nie wpisujesz</text:span> w ogóle polecenia <text:span text:style-name="Source_20_Text">CREATE DATABASE HospitalDb;</text:span>. Po prostu otwierasz pobrany plik <text:span text:style-name="Source_20_Text">create.sql</text:span>, upewniasz się, że na pasku narzędzi nad kodem (tam, gdzie wcześniej wybierałeś bazę) jest wybrana baza <text:span text:style-name="Source_20_Text"><text:span text:style-name="T1">master</text:span></text:span>, i od razu klikasz zielony trójkąt (Execute). Tabele wgrają się do bazy systemowej.</text:p>
        <text:h text:style-name="Heading_20_3" text:outline-level="3">2. Generowanie modeli z bazy (Terminal)</text:h>
        <text:p text:style-name="Text_20_body">Gdy będziesz wklejać komendę do scaffolding'u w terminalu, musisz podmienić ścieżkę na tę z polecenia. Komenda będzie wyglądać tak (dodałem <text:span text:style-name="Source_20_Text">TrustServerCertificate=True</text:span>, żeby uniknąć problemów z certyfikatami na uczelnianych komputerach):</text:p>
        <text:p text:style-name="P69">Bash</text:p>
      </text:section>
      <text:p text:style-name="P1"><text:span text:style-name="Source_20_Text">dotnet ef dbcontext scaffold "Data Source=(localdb)\MSSQLLocalDB;Initial Catalog=master;Integrated Security=True;TrustServerCertificate=True" Microsoft.EntityFrameworkCore.SqlServer -o Models -c HospitalDbContext</text:span></text:p>
      <text:h text:style-name="Heading_20_3" text:outline-level="3">3. Plik <text:span text:style-name="Source_20_Text">appsettings.json</text:span></text:h>
      <text:p text:style-name="Text_20_body">Tutaj również wrzucasz ten sam string z <text:span text:style-name="Source_20_Text">master</text:span>, pamiętając tylko o tym, żeby w formacie JSON postawić <text:span text:style-name="T1">podwójny ukośnik</text:span> (<text:span text:style-name="Source_20_Text">\\</text:span>) przed nazwą serwera:</text:p>
      <text:p text:style-name="Text_20_body">JSON</text:p>
      <text:p text:style-name="Preformatted_20_Text"><text:span text:style-name="Source_20_Text">"ConnectionStrings": {</text:span></text:p>
      <text:p text:style-name="Preformatted_20_Text"><text:span text:style-name="Source_20_Text"><text:s text:c="2"/>"DefaultConnection": "Data Source=(localdb)\\MSSQLLocalDB;Initial Catalog=master;Integrated Security=True;TrustServerCertificate=True"</text:span></text:p>
      <text:p text:style-name="P1"><text:span text:style-name="Source_20_Text">}</text:span></text:p>
      <text:p text:style-name="Text_20_body">W pliku <text:span text:style-name="Source_20_Text">Program.cs</text:span> <text:span text:style-name="T1">nic nie musisz już zmieniać</text:span> względem tego szablonu, który Ci wysłałem, ponieważ on po prostu zaczytuje to, co wpiszesz w <text:span text:style-name="Source_20_Text">appsettings.json</text:span>.</text:p>
      <text:p text:style-name="Text_20_body"><text:bookmark text:name="p-rc_62dad32d6024cd0c-134"/>Dzięki temu wszystko będzie działać na systemowej bazie dokładnie tak, jak oczekuje tego wykładowca. </text:p>
      <text:section text:style-name="Sect2" text:name="Sekcja47">
        <text:p text:style-name="Text_20_body"><text:bookmark text:name="model-response-message-contentr_deb17ee6e7b37397"/><text:bookmark text:name="p-rc_62dad32d6024cd0c-1341"/>Masz teraz kompletny przewodnik od zera do działającego endpointa. Czy czujesz, że rozumiesz mechanizm tego, jak kod komunikuje się z bazą, czy chciałbyś, żebym wyjaśnił dokładniej, co <text:soft-page-break/>dzieje się pod spodem przy zapisywaniu nowego łóżka w Zadaniu 3?</text:p>
      </text:section>
      <text:section text:style-name="Sect1" text:name="Sekcja48">
        <text:p text:style-name="Text_20_body"><text:bookmark text:name="deb17ee6e7b37397"/></text:p>
      </text:section>
      <text:section text:style-name="Sect1" text:name="827d18005c0cbc25">
        <text:p text:style-name="Text_20_body"/>
        <text:section text:style-name="Sect1" text:name="user-query-content-18">
          <text:p text:style-name="Text_20_body"/>
        </text:section>
      </text:section>
      <text:section text:style-name="Sect1" text:name="Sekcja49">
        <text:p text:style-name="P68"><text:bookmark text:name="user-query-content-18"/>podaj jeszcze szablon tej metody do scaffoldowania w przypadku jakiegos innego projektu, czym by sie roznil </text:p>
      </text:section>
      <text:section text:style-name="Sect2" text:name="model-response-message-contentr_827d18005c0cbc25">
        <text:p text:style-name="Text_20_body">Bardzo mądre podejście. Zrozumienie struktury tej komendy sprawi, że poradzisz sobie w każdej firmie i każdym projekcie, niezależnie od tego, jakiej bazy danych używają.</text:p>
        <text:p text:style-name="Text_20_body">Oto uniwersalny szablon komendy do scaffoldowania:</text:p>
        <text:p text:style-name="P69">Bash</text:p>
      </text:section>
      <text:section text:style-name="Sect2" text:name="Sekcja50">
        <text:p text:style-name="P1"><text:bookmark text:name="model-response-message-contentr_827d18005c0cbc25"/><text:span text:style-name="Source_20_Text">dotnet ef dbcontext scaffold "&lt;CONNECTION_STRING&gt;" &lt;PROVIDER&gt; -o &lt;OUTPUT_FOLDER&gt; -c &lt;CONTEXT_NAME&gt;</text:span></text:p>
        <text:h text:style-name="Heading_20_3" text:outline-level="3">Co dokładnie zmieniłoby się w innym projekcie?</text:h>
        <text:p text:style-name="Text_20_body">Gdybyś pisał np. aplikację dla sklepu internetowego albo używał innej bazy danych, podmieniłbyś te 4 elementy:</text:p>
        <text:p text:style-name="Text_20_body"><text:span text:style-name="T1">1. </text:span><text:span text:style-name="Source_20_Text"><text:span text:style-name="T1">&lt;CONNECTION_STRING&gt;</text:span></text:span><text:span text:style-name="T1"> (Połączenie z bazą)</text:span> Zamiast Twojego lokalnego <text:span text:style-name="Source_20_Text">LocalDB</text:span> na zaliczenie, mógłby to być:</text:p>
        <text:list xml:id="list332071037207399694" text:style-name="L65">
          <text:list-item>
            <text:p text:style-name="P61">Prawdziwy serwer produkcyjny na Azure/AWS.</text:p>
          </text:list-item>
          <text:list-item>
            <text:p text:style-name="P61">Inna baza na Twoim komputerze.</text:p>
          </text:list-item>
          <text:list-item>
            <text:p text:style-name="P61"><text:span text:style-name="T2">Przykład:</text:span> <text:span text:style-name="Source_20_Text">"Server=myServerAddress;Database=ShopDB;User Id=myUsername;Password=myPassword;"</text:span></text:p>
          </text:list-item>
        </text:list>
        <text:p text:style-name="Text_20_body"><text:span text:style-name="T1">2. </text:span><text:span text:style-name="Source_20_Text"><text:span text:style-name="T1">&lt;PROVIDER&gt;</text:span></text:span><text:span text:style-name="T1"> (Dostawca bazy danych)</text:span> Tutaj użyliśmy <text:span text:style-name="Source_20_Text">Microsoft.EntityFrameworkCore.SqlServer</text:span>, bo pracowałeś na technologii Microsoftu. Ale w pracy możesz spotkać inne silniki (wymaga to zainstalowania innej paczki NuGet zamiast <text:span text:style-name="Source_20_Text">...SqlServer</text:span>!):</text:p>
        <text:list xml:id="list8048663554706281966" text:style-name="L66">
          <text:list-item>
            <text:p text:style-name="P62">Dla PostgreSQL: <text:span text:style-name="Source_20_Text">Npgsql.EntityFrameworkCore.PostgreSQL</text:span></text:p>
          </text:list-item>
          <text:list-item>
            <text:p text:style-name="P62">Dla MySQL: <text:span text:style-name="Source_20_Text">Pomelo.EntityFrameworkCore.MySql</text:span></text:p>
          </text:list-item>
          <text:list-item>
            <text:p text:style-name="P62">Dla małej bazy w pliku: <text:span text:style-name="Source_20_Text">Microsoft.EntityFrameworkCore.Sqlite</text:span></text:p>
          </text:list-item>
        </text:list>
        <text:p text:style-name="Text_20_body"><text:span text:style-name="T1">3. </text:span><text:span text:style-name="Source_20_Text"><text:span text:style-name="T1">-o &lt;OUTPUT_FOLDER&gt;</text:span></text:span><text:span text:style-name="T1"> (Folder docelowy)</text:span> Użyliśmy folderu <text:span text:style-name="Source_20_Text">Models</text:span>. W innych projektach architekci mogą wymagać nazwania tego folderu np. <text:span text:style-name="Source_20_Text">Entities</text:span>, <text:span text:style-name="Source_20_Text">Database</text:span>, albo rozbicia tego na inne warstwy.</text:p>
        <text:p text:style-name="Text_20_body"><text:span text:style-name="T1">4. </text:span><text:span text:style-name="Source_20_Text"><text:span text:style-name="T1">-c &lt;CONTEXT_NAME&gt;</text:span></text:span><text:span text:style-name="T1"> (Nazwa kontekstu bazy)</text:span> Zamiast <text:span text:style-name="Source_20_Text">HospitalDbContext</text:span> nazwałbyś tę główną klasę adekwatnie do projektu, np. <text:span text:style-name="Source_20_Text">ShopContext</text:span>, <text:span text:style-name="Source_20_Text">BlogDbContext</text:span> albo po prostu <text:span text:style-name="Source_20_Text">AppDbContext</text:span> (to bardzo częsty standard).</text:p>
        <text:h text:style-name="Heading_20_3" text:outline-level="3"><text:soft-page-break/>Dwie przydatne flagi na przyszłość</text:h>
        <text:p text:style-name="Text_20_body">W prawdziwych projektach struktura bazy rzadko jest tworzona raz na zawsze. Jeśli dodasz w bazie nową tabelę lub kolumnę, musisz wygenerować kod ponownie. Do tego przydadzą Ci się dwa dodatki:</text:p>
        <text:list xml:id="list2916887359315789312" text:style-name="L67">
          <text:list-item>
            <text:p text:style-name="P63"><text:span text:style-name="Source_20_Text"><text:span text:style-name="T1">-f</text:span></text:span><text:span text:style-name="T1"> (Force):</text:span> Dopisujesz to na samym końcu komendy. Sprawia, że Entity Framework "na siłę" nadpisze istniejące już w projekcie pliki C#. Bez tego wyrzuci błąd, że pliki już istnieją.</text:p>
          </text:list-item>
          <text:list-item>
            <text:p text:style-name="P63"><text:span text:style-name="Source_20_Text"><text:span text:style-name="T1">-t &lt;NazwaTabeli&gt;</text:span></text:span><text:span text:style-name="T1">:</text:span> Jeśli w bazie masz 100 tabel, a zmieniłeś tylko jedną, nie musisz generować wszystkiego od nowa. Używasz np. <text:span text:style-name="Source_20_Text">-t Users</text:span> i EF zaktualizuje tylko klasę użytkownika.</text:p>
          </text:list-item>
        </text:list>
        <text:p text:style-name="Text_20_body">Czy masz jeszcze jakieś wątpliwości dotyczące Entity Frameworka i konfiguracji tego projektu, czy czujesz się już gotowy, by napisać to kolokwium z Web API?</text:p>
      </text:section>
      <text:section text:style-name="Sect1" text:name="Sekcja51">
        <text:p text:style-name="Text_20_body"><text:bookmark text:name="827d18005c0cbc25"/></text:p>
      </text:section>
      <text:section text:style-name="Sect1" text:name="68987c8ed5c22d5d">
        <text:p text:style-name="Text_20_body"/>
        <text:section text:style-name="Sect1" text:name="user-query-content-19">
          <text:p text:style-name="Text_20_body"/>
        </text:section>
      </text:section>
      <text:section text:style-name="Sect1" text:name="Sekcja52">
        <text:p text:style-name="P68"><text:bookmark text:name="user-query-content-19"/>Cannot resolve symbol 'PatientDto' </text:p>
      </text:section>
      <text:section text:style-name="Sect2" text:name="model-response-message-contentr_68987c8ed5c22d5d">
        <text:p text:style-name="Text_20_body">To klasyczny błąd! Oznacza on po prostu, że Twój plik <text:span text:style-name="Source_20_Text">PatientsController.cs</text:span> nie "widzi" nowo utworzonej klasy <text:span text:style-name="Source_20_Text">PatientDto</text:span>, ponieważ znajdują się one w innych folderach, a co za tym idzie – w innych przestrzeniach nazw (namespaces).</text:p>
        <text:p text:style-name="Text_20_body">Masz dwa bardzo szybkie sposoby, żeby to naprawić:</text:p>
        <text:h text:style-name="Heading_20_3" text:outline-level="3">Sposób 1: Magiczny skrót w Riderze (Najszybszy)</text:h>
        <text:p text:style-name="Text_20_body">JetBrains Rider potrafi sam znaleźć brakującą klasę i dopisać odpowiednią linijkę na górze pliku.</text:p>
        <text:list xml:id="list3118155697354985568" text:style-name="L68">
          <text:list-item>
            <text:p text:style-name="P64">Kliknij w kodzie na to podświetlone na czerwono słowo <text:span text:style-name="Source_20_Text">PatientDto</text:span> (tak, żeby migał tam kursor).</text:p>
          </text:list-item>
          <text:list-item>
            <text:p text:style-name="P64">Wciśnij na klawiaturze skrót <text:span text:style-name="Source_20_Text"><text:span text:style-name="T1">Alt + Enter</text:span></text:span>.</text:p>
          </text:list-item>
          <text:list-item>
            <text:p text:style-name="P64">Pojawi się małe menu podręczne. Wybierz pierwszą opcję, która zazwyczaj brzmi <text:span text:style-name="T1">"Import types"</text:span> albo <text:span text:style-name="T1">"using HospitalApp.DTOs;"</text:span>. Rider sam dopisze brakujący kod na górze pliku i czerwony błąd zniknie. <text:span text:style-name="T2">(Zrób to samo dla </text:span><text:span text:style-name="Source_20_Text"><text:span text:style-name="T2">AssignBedRequestDto</text:span></text:span><text:span text:style-name="T2">, jeśli podświetla się na czerwono w drugim zadaniu).</text:span></text:p>
          </text:list-item>
        </text:list>
        <text:h text:style-name="Heading_20_3" text:outline-level="3">Sposób 2: Ręczne dodanie linijki</text:h>
        <text:p text:style-name="Text_20_body">Jeśli skrót nie zadziałał, przejdź na samą górę pliku <text:span text:style-name="Source_20_Text">PatientsController.cs</text:span>. Tam, gdzie masz inne instrukcje <text:span text:style-name="Source_20_Text">using</text:span> (np. <text:span text:style-name="Source_20_Text">using Microsoft.AspNetCore.Mvc;</text:span>), dopisz ręcznie ścieżkę do folderu, w którym utworzyłeś te klasy DTO.</text:p>
        <text:p text:style-name="Text_20_body">Zakładając, że Twój projekt nazywa się <text:span text:style-name="Source_20_Text">HospitalApp</text:span> i stworzyłeś folder <text:span text:style-name="Source_20_Text">DTOs</text:span>, dopisz na samej górze:</text:p>
        <text:p text:style-name="P69"><text:soft-page-break/>C#</text:p>
      </text:section>
      <text:section text:style-name="Sect2" text:name="Sekcja53">
        <text:p text:style-name="Preformatted_20_Text"><text:bookmark text:name="model-response-message-contentr_68987c8ed5c22d5d"/><text:span text:style-name="Source_20_Text">using HospitalApp.DTOs;</text:span></text:p>
        <text:p text:style-name="P1"><text:span text:style-name="Source_20_Text">using HospitalApp.Models; // Upewnij się, że to też masz, żeby widział HospitalDbContext</text:span></text:p>
        <text:p text:style-name="Text_20_body">Zaraz po dodaniu tego <text:span text:style-name="Source_20_Text">usinga</text:span>, kontroler "zrozumie", czym jest <text:span text:style-name="Source_20_Text">PatientDto</text:span> i błąd od razu zniknie!</text:p>
      </text:section>
      <text:section text:style-name="Sect1" text:name="Sekcja54">
        <text:p text:style-name="Text_20_body"><text:bookmark text:name="68987c8ed5c22d5d"/></text:p>
      </text:section>
      <text:section text:style-name="Sect1" text:name="316933b125bf64b8">
        <text:p text:style-name="Text_20_body"/>
        <text:section text:style-name="Sect1" text:name="user-query-content-20">
          <text:p text:style-name="Text_20_body"/>
        </text:section>
      </text:section>
      <text:section text:style-name="Sect1" text:name="Sekcja55">
        <text:p text:style-name="P68"><text:bookmark text:name="user-query-content-20"/>Cannot resolve symbol 'cite_start' </text:p>
      </text:section>
      <text:section text:style-name="Sect2" text:name="model-response-message-contentr_316933b125bf64b8">
        <text:p text:style-name="Text_20_body">Błąd <text:span text:style-name="Source_20_Text">Cannot resolve symbol 'cite_start'</text:span> oznacza, że Rider znalazł w Twoim kodzie słowo <text:span text:style-name="Source_20_Text">cite_start</text:span>, którego zupełnie nie rozpoznaje jako części języka C#.</text:p>
        <text:p text:style-name="Text_20_body">W .NET, Entity Frameworku ani w kodzie, który Ci przygotowałem, <text:span text:style-name="T1">nie ma takiego słowa</text:span>.</text:p>
        <text:p text:style-name="Text_20_body">Najprawdopodobniej podczas zaznaczania i kopiowania kodu z czatu, przypadkowo skopiował się jakiś niewidoczny systemowy znacznik formatowania (czasami tak się zdarza w interfejsach AI) lub wkradła się literówka podczas pisania.</text:p>
        <text:p text:style-name="P33">Jak to szybko naprawić:</text:p>
        <text:list xml:id="list2658764056849669167" text:style-name="L69">
          <text:list-item>
            <text:p text:style-name="P65">Spójrz na dolny panel w Riderze (zakładka <text:span text:style-name="T1">Problems</text:span> lub okno z błędami kompilacji).</text:p>
          </text:list-item>
          <text:list-item>
            <text:p text:style-name="P65">Kliknij dwukrotnie na ten konkretny błąd.</text:p>
          </text:list-item>
          <text:list-item>
            <text:p text:style-name="P65">Rider przeniesie Cię dokładnie do pliku i linijki, w której znajduje się to niechciane słowo.</text:p>
          </text:list-item>
          <text:list-item>
            <text:p text:style-name="P65">Po prostu <text:span text:style-name="T1">usuń słowo </text:span><text:span text:style-name="Source_20_Text"><text:span text:style-name="T1">cite_start</text:span></text:span> z kodu.</text:p>
          </text:list-item>
        </text:list>
        <text:p text:style-name="Text_20_body">W którym pliku lub w jakiej linijce kodu Rider podświetlił Ci ten błąd? Jeśli po jego usunięciu coś nadal nie działa, wklej tu ten fragment!</text:p>
      </text:section>
      <text:section text:style-name="Sect1" text:name="Sekcja56">
        <text:p text:style-name="Text_20_body"><text:bookmark text:name="316933b125bf64b8"/></text:p>
      </text:section>
      <text:section text:style-name="Sect1" text:name="8ab819aba3474cc9">
        <text:p text:style-name="Text_20_body"/>
        <text:section text:style-name="Sect1" text:name="user-query-content-21">
          <text:p text:style-name="Text_20_body"/>
        </text:section>
      </text:section>
      <text:p text:style-name="P68">using HospitalApp.DTOs; </text:p>
      <text:p text:style-name="P68">using HospitalApp.Models; </text:p>
      <text:p text:style-name="P68">using Microsoft.AspNetCore.Mvc; </text:p>
      <text:p text:style-name="P68">using Microsoft.EntityFrameworkCore; </text:p>
      <text:p text:style-name="P68"/>
      <text:p text:style-name="P68">using Microsoft.AspNetCore.Mvc; </text:p>
      <text:p text:style-name="P68">using Microsoft.EntityFrameworkCore; </text:p>
      <text:p text:style-name="P68"><text:soft-page-break/>// Pamiętaj o dodaniu usingów do Twoich modeli i DTO, np: </text:p>
      <text:p text:style-name="P68">// using HospitalApp.Models; </text:p>
      <text:p text:style-name="P68">// using HospitalApp.DTOs; </text:p>
      <text:p text:style-name="P68"/>
      <text:p text:style-name="P68">[Route("api/[controller]")] </text:p>
      <text:p text:style-name="P68">[ApiController] </text:p>
      <text:p text:style-name="P68">public class PatientsController : ControllerBase </text:p>
      <text:p text:style-name="P68">{ </text:p>
      <text:p text:style-name="P68">private readonly HospitalDbContext _context; </text:p>
      <text:p text:style-name="P68"/>
      <text:p text:style-name="P68">// Wstrzykiwanie zależności - kontroler dostaje dostęp do bazy </text:p>
      <text:p text:style-name="P68">public PatientsController(HospitalDbContext context) </text:p>
      <text:p text:style-name="P68">{ </text:p>
      <text:p text:style-name="P68">_context = context; </text:p>
      <text:p text:style-name="P68">} </text:p>
      <text:p text:style-name="P68"/>
      <text:p text:style-name="P68">// ZADANIE 2: Pobieranie pacjentów z opcjonalnym wyszukiwaniem </text:p>
      <text:p text:style-name="P68">[HttpGet] </text:p>
      <text:p text:style-name="P68">public async Task&lt;IActionResult&gt; GetPatients([FromQuery] string? search) </text:p>
      <text:p text:style-name="P68">{ </text:p>
      <text:p text:style-name="P68">// 1. Zaczynamy zapytanie (jeszcze nie wysyłamy go do bazy) </text:p>
      <text:p text:style-name="P68">var query = _context.Patients.AsQueryable(); </text:p>
      <text:p text:style-name="P68"/>
      <text:p text:style-name="P68">[cite_start]// 2. Filtrowanie na podstawie parametru "search" z użyciem LIKE [cite: 50, 51, 57] </text:p>
      <text:p text:style-name="P68">if (!string.IsNullOrWhiteSpace(search)) </text:p>
      <text:p text:style-name="P68">{ </text:p>
      <text:p text:style-name="P68">query = query.Where(p =&gt; </text:p>
      <text:p text:style-name="P68">EF.Functions.Like(p.FirstName, $"%{search}%") || </text:p>
      <text:p text:style-name="P68">EF.Functions.Like(p.LastName, $"%{search}%") </text:p>
      <text:p text:style-name="P68">); </text:p>
      <text:p text:style-name="P68">} </text:p>
      <text:p text:style-name="P68"><text:soft-page-break/></text:p>
      <text:p text:style-name="P68">// 3. Mapowanie na DTO i pobranie z bazy (Select automatycznie zrobi Joiny pod spodem) </text:p>
      <text:p text:style-name="P68">var patients = await query.Select(p =&gt; new PatientDto </text:p>
      <text:p text:style-name="P68">{ </text:p>
      <text:p text:style-name="P68">Pesel = p.Pesel, </text:p>
      <text:p text:style-name="P68">FirstName = p.FirstName, </text:p>
      <text:p text:style-name="P68">LastName = p.LastName, </text:p>
      <text:p text:style-name="P68">Age = p.Age, </text:p>
      <text:p text:style-name="P68">Sex = p.Sex ? "Male" : "Female", // bit 1 to Male, 0 to Female z zadania </text:p>
      <text:p text:style-name="P68">// Mapowanie zagnieżdżonych przyjęć </text:p>
      <text:p text:style-name="P68">Admissions = p.Admissions.Select(a =&gt; new AdmissionDto </text:p>
      <text:p text:style-name="P68">{ </text:p>
      <text:p text:style-name="P68">Id = a.Id, </text:p>
      <text:p text:style-name="P68">AdmissionDate = a.AdmissionDate, </text:p>
      <text:p text:style-name="P68">DischargeDate = a.DischargeDate, </text:p>
      <text:p text:style-name="P68">Ward = new WardDto </text:p>
      <text:p text:style-name="P68">{ </text:p>
      <text:p text:style-name="P68">Id = a.Ward.Id, </text:p>
      <text:p text:style-name="P68">Name = a.Ward.Name, </text:p>
      <text:p text:style-name="P68">Description = a.Ward.Description </text:p>
      <text:p text:style-name="P68">} </text:p>
      <text:p text:style-name="P68">}).ToList(), </text:p>
      <text:p text:style-name="P68"/>
      <text:p text:style-name="P68">// Mapowanie zagnieżdżonych przypisań łóżek </text:p>
      <text:p text:style-name="P68">BedAssignments = p.BedAssignments.Select(ba =&gt; new BedAssignmentDto </text:p>
      <text:p text:style-name="P68">{ </text:p>
      <text:p text:style-name="P68">Id = ba.Id, </text:p>
      <text:p text:style-name="P68">From = ba.From, </text:p>
      <text:p text:style-name="P68">To = ba.To, </text:p>
      <text:p text:style-name="P68">Bed = new BedDto </text:p>
      <text:p text:style-name="P68">{ </text:p>
      <text:p text:style-name="P68"><text:soft-page-break/>Id = ba.Bed.Id, </text:p>
      <text:p text:style-name="P68">BedType = new BedTypeDto </text:p>
      <text:p text:style-name="P68">{ </text:p>
      <text:p text:style-name="P68">Id = ba.Bed.BedType.Id, </text:p>
      <text:p text:style-name="P68">Name = ba.Bed.BedType.Name, </text:p>
      <text:p text:style-name="P68">Description = ba.Bed.BedType.Description </text:p>
      <text:p text:style-name="P68">}, </text:p>
      <text:p text:style-name="P68">Room = new RoomDto </text:p>
      <text:p text:style-name="P68">{ </text:p>
      <text:p text:style-name="P68">Id = ba.Bed.Room.Id, </text:p>
      <text:p text:style-name="P68">HasTv = ba.Bed.Room.HasTv, </text:p>
      <text:p text:style-name="P68">Ward = new WardDto </text:p>
      <text:p text:style-name="P68">{ </text:p>
      <text:p text:style-name="P68">Id = ba.Bed.Room.Ward.Id, </text:p>
      <text:p text:style-name="P68">Name = ba.Bed.Room.Ward.Name, </text:p>
      <text:p text:style-name="P68">Description = ba.Bed.Room.Ward.Description </text:p>
      <text:p text:style-name="P68">} </text:p>
      <text:p text:style-name="P68">} </text:p>
      <text:p text:style-name="P68">} </text:p>
      <text:p text:style-name="P68">}).ToList() </text:p>
      <text:p text:style-name="P68">}).ToListAsync(); </text:p>
      <text:p text:style-name="P68"/>
      <text:p text:style-name="P68">return Ok(patients); // Zwraca HTTP 200 z listą JSON </text:p>
      <text:p text:style-name="P68">} </text:p>
      <text:p text:style-name="P68">tu jest cite start </text:p>
      <text:section text:style-name="Sect1" text:name="Sekcja57">
        <text:p text:style-name="Text_20_body"><text:bookmark text:name="user-query-content-21"/></text:p>
      </text:section>
      <text:section text:style-name="Sect2" text:name="model-response-message-contentr_8ab819aba3474cc9">
        <text:p text:style-name="Text_20_body">Ah, teraz widzę! To i <text:span text:style-name="Source_20_Text">[cite: 50, 51, 57]</text:span> wkradło się do mojego poprzedniego kodu z powodu wewnętrznych znaczników systemu AI, które próbowały wskazać, skąd wziąłem informacje (w tym przypadku z instrukcji zadania). Przepraszam za to zamieszanie.</text:p>
        <text:p text:style-name="Text_20_body">Musisz po prostu usunąć te znaczniki z komentarza. C# nie rozumie, czym jest ``.</text:p>
        <text:p text:style-name="Text_20_body">Zmień tę linijkę:</text:p>
        <text:p text:style-name="P69"><text:soft-page-break/>C#</text:p>
      </text:section>
      <text:p text:style-name="P1"><text:span text:style-name="Source_20_Text">[cite_start]// 2. Filtrowanie na podstawie parametru "search" z użyciem LIKE [cite: 50, 51, 57]</text:span></text:p>
      <text:p text:style-name="Text_20_body">Na zwykły komentarz:</text:p>
      <text:p text:style-name="Text_20_body">C#</text:p>
      <text:p text:style-name="P1"><text:span text:style-name="Source_20_Text">// 2. Filtrowanie na podstawie parametru "search" z użyciem LIKE</text:span></text:p>
      <text:p text:style-name="Text_20_body">Po usunięciu tego błąd natychmiast zniknie.</text:p>
      <text:p text:style-name="Text_20_body">Zauważyłem też, że na samej górze masz podwójnie wklejone <text:span text:style-name="Source_20_Text">using Microsoft.AspNetCore.Mvc;</text:span> oraz <text:span text:style-name="Source_20_Text">using Microsoft.EntityFrameworkCore;</text:span>. To nie jest krytyczny błąd (C# to zignoruje), ale dla porządku możesz usunąć te duplikaty.</text:p>
      <text:p text:style-name="Text_20_body">Oto cały, poprawiony i czysty kod Twojego pliku <text:span text:style-name="Source_20_Text">PatientsController.cs</text:span>:</text:p>
      <text:p text:style-name="P69">C#</text:p>
      <text:section text:style-name="Sect2" text:name="Sekcja58">
        <text:p text:style-name="Preformatted_20_Text"><text:bookmark text:name="model-response-message-contentr_8ab819aba3474cc9"/><text:span text:style-name="Source_20_Text">using HospitalApp.DTOs;</text:span></text:p>
        <text:p text:style-name="Preformatted_20_Text"><text:span text:style-name="Source_20_Text">using HospitalApp.Models;</text:span></text:p>
        <text:p text:style-name="Preformatted_20_Text"><text:span text:style-name="Source_20_Text">using Microsoft.AspNetCore.Mvc;</text:span></text:p>
        <text:p text:style-name="Preformatted_20_Text"><text:span text:style-name="Source_20_Text">using Microsoft.EntityFrameworkCore;</text:span></text:p>
        <text:p text:style-name="Preformatted_20_Text"/>
        <text:p text:style-name="Preformatted_20_Text"><text:span text:style-name="Source_20_Text">namespace HospitalApp.Controllers // Upewnij się, że masz tu odpowiedni namespace</text:span></text:p>
        <text:p text:style-name="Preformatted_20_Text"><text:span text:style-name="Source_20_Text">{</text:span></text:p>
        <text:p text:style-name="Preformatted_20_Text"><text:span text:style-name="Source_20_Text"><text:s text:c="4"/>[Route("api/[controller]")]</text:span></text:p>
        <text:p text:style-name="Preformatted_20_Text"><text:span text:style-name="Source_20_Text"><text:s text:c="4"/>[ApiController]</text:span></text:p>
        <text:p text:style-name="Preformatted_20_Text"><text:span text:style-name="Source_20_Text"><text:s text:c="4"/>public class PatientsController : ControllerBase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private readonly HospitalDbContext _context;</text:span></text:p>
        <text:p text:style-name="Preformatted_20_Text"/>
        <text:p text:style-name="Preformatted_20_Text"><text:span text:style-name="Source_20_Text"><text:s text:c="8"/>// Wstrzykiwanie zależności - kontroler dostaje dostęp do bazy</text:span></text:p>
        <text:p text:style-name="Preformatted_20_Text"><text:span text:style-name="Source_20_Text"><text:s text:c="8"/>public PatientsController(HospitalDbContext context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_context = context;</text:span></text:p>
        <text:p text:style-name="Preformatted_20_Text"><text:span text:style-name="Source_20_Text"><text:s text:c="8"/>}</text:span></text:p>
        <text:p text:style-name="Preformatted_20_Text"/>
        <text:p text:style-name="Preformatted_20_Text"><text:span text:style-name="Source_20_Text"><text:s text:c="8"/>// ZADANIE 2: Pobieranie pacjentów z opcjonalnym wyszukiwaniem</text:span></text:p>
        <text:p text:style-name="Preformatted_20_Text"><text:span text:style-name="Source_20_Text"><text:s text:c="8"/>[HttpGet]</text:span></text:p>
        <text:p text:style-name="Preformatted_20_Text"><text:span text:style-name="Source_20_Text"><text:s text:c="8"/>public async Task&lt;IActionResult&gt; GetPatients([FromQuery] string? search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// 1. Zaczynamy zapytanie (jeszcze nie wysyłamy go do bazy)</text:span></text:p>
        <text:p text:style-name="Preformatted_20_Text"><text:span text:style-name="Source_20_Text"><text:s text:c="12"/>var query = _context.Patients.AsQueryable();</text:span></text:p>
        <text:p text:style-name="Preformatted_20_Text"/>
        <text:p text:style-name="Preformatted_20_Text"><text:span text:style-name="Source_20_Text"><text:s text:c="12"/>// 2. Filtrowanie na podstawie parametru "search" z użyciem LIKE</text:span></text:p>
        <text:p text:style-name="Preformatted_20_Text"><text:span text:style-name="Source_20_Text"><text:s text:c="12"/>if (!string.IsNullOrWhiteSpace(search))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query = query.Where(p =&gt; </text:span></text:p>
        <text:p text:style-name="Preformatted_20_Text"><text:span text:style-name="Source_20_Text"><text:s text:c="20"/>EF.Functions.Like(p.FirstName, $"%{search}%") || </text:span></text:p>
        <text:p text:style-name="Preformatted_20_Text"><text:span text:style-name="Source_20_Text"><text:s text:c="20"/>EF.Functions.Like(p.LastName, $"%{search}%")</text:span></text:p>
        <text:p text:style-name="Preformatted_20_Text"><text:span text:style-name="Source_20_Text"><text:s text:c="16"/>);</text:span></text:p>
        <text:p text:style-name="Preformatted_20_Text"><text:span text:style-name="Source_20_Text"><text:s text:c="12"/>}</text:span></text:p>
        <text:p text:style-name="Preformatted_20_Text"/>
        <text:p text:style-name="Preformatted_20_Text"><text:span text:style-name="Source_20_Text"><text:s text:c="12"/>// 3. Mapowanie na DTO i pobranie z bazy (Select automatycznie zrobi Joiny pod spodem)</text:span></text:p>
        <text:p text:style-name="Preformatted_20_Text"><text:span text:style-name="Source_20_Text"><text:s text:c="12"/>var patients = await query.Select(p =&gt; new PatientDto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Pesel = p.Pesel,</text:span></text:p>
        <text:p text:style-name="Preformatted_20_Text"><text:span text:style-name="Source_20_Text"><text:s text:c="16"/>FirstName = p.FirstName,</text:span></text:p>
        <text:p text:style-name="Preformatted_20_Text"><text:soft-page-break/><text:span text:style-name="Source_20_Text"><text:s text:c="16"/>LastName = p.LastName,</text:span></text:p>
        <text:p text:style-name="Preformatted_20_Text"><text:span text:style-name="Source_20_Text"><text:s text:c="16"/>Age = p.Age,</text:span></text:p>
        <text:p text:style-name="Preformatted_20_Text"><text:span text:style-name="Source_20_Text"><text:s text:c="16"/>Sex = p.Sex ? "Male" : "Female", // bit 1 to Male, 0 to Female z zadania</text:span></text:p>
        <text:p text:style-name="Preformatted_20_Text"><text:span text:style-name="Source_20_Text"><text:s text:c="16"/></text:span></text:p>
        <text:p text:style-name="Preformatted_20_Text"><text:span text:style-name="Source_20_Text"><text:s text:c="16"/>// Mapowanie zagnieżdżonych przyjęć</text:span></text:p>
        <text:p text:style-name="Preformatted_20_Text"><text:span text:style-name="Source_20_Text"><text:s text:c="16"/>Admissions = p.Admissions.Select(a =&gt; new AdmissionDto</text:span></text:p>
        <text:p text:style-name="Preformatted_20_Text"><text:span text:style-name="Source_20_Text"><text:s text:c="16"/>{</text:span></text:p>
        <text:p text:style-name="Preformatted_20_Text"><text:span text:style-name="Source_20_Text"><text:s text:c="20"/>Id = a.Id,</text:span></text:p>
        <text:p text:style-name="Preformatted_20_Text"><text:span text:style-name="Source_20_Text"><text:s text:c="20"/>AdmissionDate = a.AdmissionDate,</text:span></text:p>
        <text:p text:style-name="Preformatted_20_Text"><text:span text:style-name="Source_20_Text"><text:s text:c="20"/>DischargeDate = a.DischargeDate,</text:span></text:p>
        <text:p text:style-name="Preformatted_20_Text"><text:span text:style-name="Source_20_Text"><text:s text:c="20"/>Ward = new WardDto</text:span></text:p>
        <text:p text:style-name="Preformatted_20_Text"><text:span text:style-name="Source_20_Text"><text:s text:c="20"/>{</text:span></text:p>
        <text:p text:style-name="Preformatted_20_Text"><text:span text:style-name="Source_20_Text"><text:s text:c="24"/>Id = a.Ward.Id,</text:span></text:p>
        <text:p text:style-name="Preformatted_20_Text"><text:span text:style-name="Source_20_Text"><text:s text:c="24"/>Name = a.Ward.Name,</text:span></text:p>
        <text:p text:style-name="Preformatted_20_Text"><text:span text:style-name="Source_20_Text"><text:s text:c="24"/>Description = a.Ward.Description</text:span></text:p>
        <text:p text:style-name="Preformatted_20_Text"><text:span text:style-name="Source_20_Text"><text:s text:c="20"/>}</text:span></text:p>
        <text:p text:style-name="Preformatted_20_Text"><text:span text:style-name="Source_20_Text"><text:s text:c="16"/>}).ToList(),</text:span></text:p>
        <text:p text:style-name="Preformatted_20_Text"/>
        <text:p text:style-name="Preformatted_20_Text"><text:span text:style-name="Source_20_Text"><text:s text:c="16"/>// Mapowanie zagnieżdżonych przypisań łóżek</text:span></text:p>
        <text:p text:style-name="Preformatted_20_Text"><text:span text:style-name="Source_20_Text"><text:s text:c="16"/>BedAssignments = p.BedAssignments.Select(ba =&gt; new BedAssignmentDto</text:span></text:p>
        <text:p text:style-name="Preformatted_20_Text"><text:span text:style-name="Source_20_Text"><text:s text:c="16"/>{</text:span></text:p>
        <text:p text:style-name="Preformatted_20_Text"><text:span text:style-name="Source_20_Text"><text:s text:c="20"/>Id = ba.Id,</text:span></text:p>
        <text:p text:style-name="Preformatted_20_Text"><text:span text:style-name="Source_20_Text"><text:s text:c="20"/>From = ba.From,</text:span></text:p>
        <text:p text:style-name="Preformatted_20_Text"><text:span text:style-name="Source_20_Text"><text:s text:c="20"/>To = ba.To,</text:span></text:p>
        <text:p text:style-name="Preformatted_20_Text"><text:span text:style-name="Source_20_Text"><text:s text:c="20"/>Bed = new BedDto</text:span></text:p>
        <text:p text:style-name="Preformatted_20_Text"><text:span text:style-name="Source_20_Text"><text:s text:c="20"/>{</text:span></text:p>
        <text:p text:style-name="Preformatted_20_Text"><text:span text:style-name="Source_20_Text"><text:s text:c="24"/>Id = ba.Bed.Id,</text:span></text:p>
        <text:p text:style-name="Preformatted_20_Text"><text:span text:style-name="Source_20_Text"><text:s text:c="24"/>BedType = new BedTypeDto</text:span></text:p>
        <text:p text:style-name="Preformatted_20_Text"><text:span text:style-name="Source_20_Text"><text:s text:c="24"/>{</text:span></text:p>
        <text:p text:style-name="Preformatted_20_Text"><text:span text:style-name="Source_20_Text"><text:s text:c="28"/>Id = ba.Bed.BedType.Id,</text:span></text:p>
        <text:p text:style-name="Preformatted_20_Text"><text:span text:style-name="Source_20_Text"><text:s text:c="28"/>Name = ba.Bed.BedType.Name,</text:span></text:p>
        <text:p text:style-name="Preformatted_20_Text"><text:span text:style-name="Source_20_Text"><text:s text:c="28"/>Description = ba.Bed.BedType.Description</text:span></text:p>
        <text:p text:style-name="Preformatted_20_Text"><text:span text:style-name="Source_20_Text"><text:s text:c="24"/>},</text:span></text:p>
        <text:p text:style-name="Preformatted_20_Text"><text:span text:style-name="Source_20_Text"><text:s text:c="24"/>Room = new RoomDto</text:span></text:p>
        <text:p text:style-name="Preformatted_20_Text"><text:span text:style-name="Source_20_Text"><text:s text:c="24"/>{</text:span></text:p>
        <text:p text:style-name="Preformatted_20_Text"><text:span text:style-name="Source_20_Text"><text:s text:c="28"/>Id = ba.Bed.Room.Id,</text:span></text:p>
        <text:p text:style-name="Preformatted_20_Text"><text:span text:style-name="Source_20_Text"><text:s text:c="28"/>HasTv = ba.Bed.Room.HasTv,</text:span></text:p>
        <text:p text:style-name="Preformatted_20_Text"><text:span text:style-name="Source_20_Text"><text:s text:c="28"/>Ward = new WardDto</text:span></text:p>
        <text:p text:style-name="Preformatted_20_Text"><text:span text:style-name="Source_20_Text"><text:s text:c="28"/>{</text:span></text:p>
        <text:p text:style-name="Preformatted_20_Text"><text:span text:style-name="Source_20_Text"><text:s text:c="32"/>Id = ba.Bed.Room.Ward.Id,</text:span></text:p>
        <text:p text:style-name="Preformatted_20_Text"><text:span text:style-name="Source_20_Text"><text:s text:c="32"/>Name = ba.Bed.Room.Ward.Name,</text:span></text:p>
        <text:p text:style-name="Preformatted_20_Text"><text:span text:style-name="Source_20_Text"><text:s text:c="32"/>Description = ba.Bed.Room.Ward.Description</text:span></text:p>
        <text:p text:style-name="Preformatted_20_Text"><text:span text:style-name="Source_20_Text"><text:s text:c="28"/>}</text:span></text:p>
        <text:p text:style-name="Preformatted_20_Text"><text:span text:style-name="Source_20_Text"><text:s text:c="24"/>}</text:span></text:p>
        <text:p text:style-name="Preformatted_20_Text"><text:span text:style-name="Source_20_Text"><text:s text:c="20"/>}</text:span></text:p>
        <text:p text:style-name="Preformatted_20_Text"><text:span text:style-name="Source_20_Text"><text:s text:c="16"/>}).ToList()</text:span></text:p>
        <text:p text:style-name="Preformatted_20_Text"><text:span text:style-name="Source_20_Text"><text:s text:c="12"/>}).ToListAsync();</text:span></text:p>
        <text:p text:style-name="Preformatted_20_Text"/>
        <text:p text:style-name="Preformatted_20_Text"><text:span text:style-name="Source_20_Text"><text:s text:c="12"/>return Ok(patients); // Zwraca HTTP 200 z listą JSON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// ZADANIE 3: Przypisanie pacjentowi łóżka</text:span></text:p>
        <text:p text:style-name="Preformatted_20_Text"><text:span text:style-name="Source_20_Text"><text:s text:c="8"/>[HttpPost("{pesel}/bedassignments")]</text:span></text:p>
        <text:p text:style-name="Preformatted_20_Text"><text:span text:style-name="Source_20_Text"><text:s text:c="8"/>public async Task&lt;IActionResult&gt; AssignBed(string pesel, [FromBody] AssignBedRequestDto request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var patientExists = await _context.Patients.AnyAsync(p =&gt; p.Pesel == pesel);</text:span></text:p>
        <text:p text:style-name="Preformatted_20_Text"><text:span text:style-name="Source_20_Text"><text:s text:c="12"/>if (!patientExists)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return NotFound($"Pacjent o numerze PESEL {pesel} nie istnieje w bazie.");</text:span></text:p>
        <text:p text:style-name="Preformatted_20_Text"><text:soft-page-break/><text:span text:style-name="Source_20_Text"><text:s text:c="12"/>}</text:span></text:p>
        <text:p text:style-name="Preformatted_20_Text"/>
        <text:p text:style-name="Preformatted_20_Text"><text:span text:style-name="Source_20_Text"><text:s text:c="12"/>var availableBed = await _context.Beds</text:span></text:p>
        <text:p text:style-name="Preformatted_20_Text"><text:span text:style-name="Source_20_Text"><text:s text:c="16"/>.Where(b =&gt; b.BedType.Name == request.BedType &amp;&amp; b.Room.Ward.Name == request.Ward)</text:span></text:p>
        <text:p text:style-name="Preformatted_20_Text"><text:span text:style-name="Source_20_Text"><text:s text:c="16"/>.Where(b =&gt; !b.BedAssignments.Any(existingAssignment =&gt; </text:span></text:p>
        <text:p text:style-name="Preformatted_20_Text"><text:span text:style-name="Source_20_Text"><text:s text:c="20"/>(request.To == null || existingAssignment.From &lt; request.To) &amp;&amp;</text:span></text:p>
        <text:p text:style-name="Preformatted_20_Text"><text:span text:style-name="Source_20_Text"><text:s text:c="20"/>(existingAssignment.To == null || existingAssignment.To &gt; request.From)</text:span></text:p>
        <text:p text:style-name="Preformatted_20_Text"><text:span text:style-name="Source_20_Text"><text:s text:c="16"/>))</text:span></text:p>
        <text:p text:style-name="Preformatted_20_Text"><text:span text:style-name="Source_20_Text"><text:s text:c="16"/>.FirstOrDefaultAsync();</text:span></text:p>
        <text:p text:style-name="Preformatted_20_Text"/>
        <text:p text:style-name="Preformatted_20_Text"><text:span text:style-name="Source_20_Text"><text:s text:c="12"/>if (availableBed == null)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return StatusCode(404, "Nie znaleziono wolnego łóżka o zadanym typie, na wskazanym oddziale, we wskazanym okresie czasu.");</text:span></text:p>
        <text:p text:style-name="Preformatted_20_Text"><text:span text:style-name="Source_20_Text"><text:s text:c="12"/>}</text:span></text:p>
        <text:p text:style-name="Preformatted_20_Text"/>
        <text:p text:style-name="Preformatted_20_Text"><text:span text:style-name="Source_20_Text"><text:s text:c="12"/>var newAssignment = new BedAssignment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PatientPesel = pesel,</text:span></text:p>
        <text:p text:style-name="Preformatted_20_Text"><text:span text:style-name="Source_20_Text"><text:s text:c="16"/>BedId = availableBed.Id,</text:span></text:p>
        <text:p text:style-name="Preformatted_20_Text"><text:span text:style-name="Source_20_Text"><text:s text:c="16"/>From = request.From,</text:span></text:p>
        <text:p text:style-name="Preformatted_20_Text"><text:span text:style-name="Source_20_Text"><text:s text:c="16"/>To = request.To</text:span></text:p>
        <text:p text:style-name="Preformatted_20_Text"><text:span text:style-name="Source_20_Text"><text:s text:c="12"/>};</text:span></text:p>
        <text:p text:style-name="Preformatted_20_Text"/>
        <text:p text:style-name="Preformatted_20_Text"><text:span text:style-name="Source_20_Text"><text:s text:c="12"/>_context.BedAssignments.Add(newAssignment);</text:span></text:p>
        <text:p text:style-name="Preformatted_20_Text"><text:span text:style-name="Source_20_Text"><text:s text:c="12"/>await _context.SaveChangesAsync();</text:span></text:p>
        <text:p text:style-name="Preformatted_20_Text"/>
        <text:p text:style-name="Preformatted_20_Text"><text:span text:style-name="Source_20_Text"><text:s text:c="12"/>return Created("", new { Message = "Łóżko zostało pomyślnie przypisane.", AssignmentId = newAssignment.Id }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1"><text:span text:style-name="Source_20_Text">}</text:span></text:p>
        <text:p text:style-name="Text_20_body">Uruchom teraz projekt (zielony trójkąt na górze). Powinna otworzyć się przeglądarka ze stroną Swagger. Tam będziesz mógł przetestować oba endpointy!</text:p>
      </text:section>
      <text:section text:style-name="Sect1" text:name="Sekcja59">
        <text:p text:style-name="P69"><text:bookmark text:name="8ab819aba3474cc9"/></text:p>
      </text:section>
      <text:section text:style-name="Sect1" text:name="de0137e8f5ac435c">
        <text:p text:style-name="P69"/>
      </text:section>
      <text:section text:style-name="Sect2" text:name="model-response-message-contentr_de0137e8f5ac435c">
        <text:p text:style-name="Text_20_body">Wszystko u Ciebie wygląda <text:span text:style-name="T1">idealnie</text:span>! Baza danych jest podłączona, scaffolding zadziałał perfekcyjnie (widzę pełen folder <text:span text:style-name="Source_20_Text">Models</text:span>), a kod w <text:span text:style-name="Source_20_Text">Program.cs</text:span> nie zgłasza żadnych błędów. Odwaliłeś kawał świetnej inżynierskiej roboty.</text:p>
        <text:p text:style-name="Text_20_body">Komunikat, który pojawił się w prawym dolnym rogu (<text:span text:style-name="T1">"IIS Express executable (64-bit) is not found"</text:span>), to tylko drobny problem z konfiguracją uruchamiania w Riderze.</text:p>
        <text:p text:style-name="Text_20_body">Twój Rider próbuje uruchomić aplikację, używając starego serwera internetowego o nazwie IIS Express (który jest domyślny dla Visual Studio, ale możesz go nie mieć na komputerze). W nowoczesnych aplikacjach .NET w ogóle go nie potrzebujemy – używamy wbudowanego serwera (Kestrel).</text:p>
        <text:p text:style-name="Text_20_body">Oto jak to naprawić jednym kliknięciem:</text:p>
        <text:h text:style-name="Heading_20_3" text:outline-level="3">Zmiana profilu uruchamiania w Riderze</text:h>
        <text:list xml:id="list7333833277919049108" text:style-name="L70">
          <text:list-item>
            <text:p text:style-name="P66">Spójrz na samą górę okna Ridera, na główny pasek narzędzi (tuż obok zielonego przycisku <text:soft-page-break/>Play / trójkąta).</text:p>
          </text:list-item>
          <text:list-item>
            <text:p text:style-name="P66">Zobaczysz tam rozwijaną listę, na której obecnie najprawdopodobniej wybrane jest <text:span text:style-name="T1">IIS Express</text:span>.</text:p>
          </text:list-item>
          <text:list-item>
            <text:p text:style-name="P66">Kliknij w tę listę.</text:p>
          </text:list-item>
          <text:list-item>
            <text:p text:style-name="P66">Zmień wybór na profil o nazwie Twojego projektu (czyli <text:span text:style-name="T1">HospitalApp</text:span>), albo na profil o nazwie <text:span text:style-name="T1">http</text:span> lub <text:span text:style-name="T1">https</text:span>.</text:p>
          </text:list-item>
          <text:list-item>
            <text:p text:style-name="P66">Kiedy profil się zmieni, ponownie kliknij <text:span text:style-name="T1">zielony trójkąt (Run)</text:span>.</text:p>
          </text:list-item>
        </text:list>
        <text:p text:style-name="Text_20_body">Tym razem aplikacja powinna zbudować się bez błędu, a w Twojej domyślnej przeglądarce internetowej automatycznie otworzy się strona <text:span text:style-name="T1">Swagger</text:span>. Będziesz tam widział swoje dwa endpointy: <text:span text:style-name="Source_20_Text">GET /api/patients</text:span> oraz <text:span text:style-name="Source_20_Text">POST /api/patients/{pesel}/bedassignments</text:span>. Możesz je stamtąd wygodnie przetestować, klikając <text:span text:style-name="T2">Try it out</text:span> i <text:span text:style-name="T2">Execute</text:span>!</text:p>
      </text:section>
      <text:section text:style-name="Sect1" text:name="Sekcja60">
        <text:p text:style-name="P69"><text:bookmark text:name="de0137e8f5ac435c"/></text:p>
      </text:section>
      <text:section text:style-name="Sect1" text:name="941dd6cd9122353d">
        <text:p text:style-name="P69"/>
        <text:section text:style-name="Sect1" text:name="user-query-content-23">
          <text:p text:style-name="P69"/>
        </text:section>
      </text:section>
      <text:section text:style-name="Sect1" text:name="Sekcja61">
        <text:p text:style-name="P68"><text:bookmark text:name="user-query-content-23"/>a jakbym nie mial swaggera to w pluginach w nugecie go dac po prostu? </text:p>
      </text:section>
      <text:section text:style-name="Sect2" text:name="model-response-message-contentr_941dd6cd9122353d">
        <text:p text:style-name="Text_20_body">Dokładnie tak! Jeśli przy tworzeniu projektu zapomniałbyś zaznaczyć okienka "Enable OpenAPI support", Swagger po prostu by się nie wygenerował. W świecie .NET to nie jest żadna magiczna funkcja wbudowana na stałe w edytor, tylko zwykła, zewnętrzna paczka.</text:p>
        <text:p text:style-name="Text_20_body">Gdybyś znalazł się w takiej sytuacji, musisz zrobić tylko dwie rzeczy:</text:p>
        <text:h text:style-name="Heading_20_3" text:outline-level="3">1. Pobranie paczki NuGet</text:h>
        <text:p text:style-name="Text_20_body">Otwierasz zakładkę <text:span text:style-name="T1">NuGet</text:span> na dole Ridera (lub terminal) i instalujesz paczkę, która nazywa się <text:span text:style-name="Source_20_Text"><text:span text:style-name="T1">Swashbuckle.AspNetCore</text:span></text:span>. W terminalu wyglądałoby to tak:</text:p>
        <text:p text:style-name="P69">Bash</text:p>
      </text:section>
      <text:p text:style-name="P1"><text:span text:style-name="Source_20_Text">dotnet add package Swashbuckle.AspNetCore</text:span></text:p>
      <text:h text:style-name="Heading_20_3" text:outline-level="3">2. Aktywacja w <text:span text:style-name="Source_20_Text">Program.cs</text:span></text:h>
      <text:p text:style-name="Text_20_body">Następnie musisz "włączyć" ten plugin w pliku startowym. Co ciekawe, w kodzie, który Ci wcześniej wysłałem, te linijki już są przygotowane! Gdybyś robił to od zera bez kreatora, musiałbyś dopisać:</text:p>
      <text:p text:style-name="Text_20_body">Przed <text:span text:style-name="Source_20_Text">builder.Build()</text:span>:</text:p>
      <text:p text:style-name="Text_20_body">C#</text:p>
      <text:p text:style-name="Preformatted_20_Text"><text:span text:style-name="Source_20_Text">builder.Services.AddEndpointsApiExplorer();</text:span></text:p>
      <text:p text:style-name="P1"><text:span text:style-name="Source_20_Text">builder.Services.AddSwaggerGen(); // To generuje plik z opisem Twojego API</text:span></text:p>
      <text:p text:style-name="Text_20_body">Po <text:span text:style-name="Source_20_Text">builder.Build()</text:span>:</text:p>
      <text:p text:style-name="P69">C#</text:p>
      <text:section text:style-name="Sect2" text:name="Sekcja62">
        <text:p text:style-name="Preformatted_20_Text"><text:bookmark text:name="model-response-message-contentr_941dd6cd9122353d"/><text:soft-page-break/><text:span text:style-name="Source_20_Text">if (app.Environment.IsDevelopment())</text:span></text:p>
        <text:p text:style-name="Preformatted_20_Text"><text:span text:style-name="Source_20_Text">{</text:span></text:p>
        <text:p text:style-name="Preformatted_20_Text"><text:span text:style-name="Source_20_Text"><text:s text:c="4"/>app.UseSwagger(); <text:s text:c="2"/>// Udostępnia wygenerowany plik JSON</text:span></text:p>
        <text:p text:style-name="Preformatted_20_Text"><text:span text:style-name="Source_20_Text"><text:s text:c="4"/>app.UseSwaggerUI(); // Rysuje tę ładną stronę graficzną w przeglądarce</text:span></text:p>
        <text:p text:style-name="P1"><text:span text:style-name="Source_20_Text">}</text:span></text:p>
        <text:p text:style-name="Text_20_body">Więc Twoja intuicja działa bezbłędnie – w .NET niemal wszystko, czego Ci brakuje (Swagger, Entity Framework, autoryzacja, obsługa specyficznych baz danych), rozwiązuje się po prostu dociągnięciem odpowiedniej paczki NuGet.</text:p>
      </text:section>
      <text:section text:style-name="Sect1" text:name="Sekcja63">
        <text:p text:style-name="P69"><text:bookmark text:name="941dd6cd9122353d"/></text:p>
      </text:section>
      <text:section text:style-name="Sect1" text:name="a94c90a6c1a829a3">
        <text:p text:style-name="P69"/>
        <text:section text:style-name="Sect1" text:name="user-query-content-24">
          <text:p text:style-name="P69"/>
        </text:section>
      </text:section>
      <text:section text:style-name="Sect1" text:name="Sekcja64">
        <text:p text:style-name="P68"><text:bookmark text:name="user-query-content-24"/>zapisz całą naszą rozmowę do jakiegoś pliku do pobrania </text:p>
      </text:section>
      <text:section text:style-name="Sect2" text:name="model-response-message-contentr_a94c90a6c1a829a3">
        <text:p text:style-name="Text_20_body">Nie potrafię zapisać naszej rozmowy do pliku, który mógłbyś bezpośrednio pobrać.</text:p>
        <text:p text:style-name="Text_20_body">Jednak bardzo łatwo możesz to zrobić sam:</text:p>
        <text:list xml:id="list6799896198222076210" text:style-name="L71">
          <text:list-item>
            <text:p text:style-name="P67">Zaznacz cały tekst naszej rozmowy (np. używając skrótu Ctrl+A lub zaznaczając kursorem).</text:p>
          </text:list-item>
          <text:list-item>
            <text:p text:style-name="P67">Skopiuj go (Ctrl+C).</text:p>
          </text:list-item>
          <text:list-item>
            <text:p text:style-name="P67">Otwórz nowy dokument w dowolnym edytorze tekstu (Notatnik, Word, Dokumenty Google).</text:p>
          </text:list-item>
          <text:list-item>
            <text:p text:style-name="P67">Wklej skopiowany tekst (Ctrl+V) i zapisz plik na swoim komputerze.</text:p>
          </text:list-item>
        </text:list>
        <text:p text:style-name="Text_20_body">Dzięki temu będziesz miał wszystkie wskazówki i kod gotowe do powtórki przed kolokwium! Czy masz jeszcze jakieś pytania dotyczące projektu Web API lub Entity Framework?</text:p>
      </text:section>
      <text:section text:style-name="Sect1" text:name="Sekcja65">
        <text:p text:style-name="P69"><text:bookmark text:name="chat-history"/></text:p>
        <text:section text:style-name="Sect1" text:name="Sekcja66">
          <text:p text:style-name="P69"><text:bookmark text:name="a94c90a6c1a829a3"/></text:p>
        </text:section>
      </text:section>
      <text:p text:style-name="Text_20_body"/>
      <text:p text:style-name="Text_20_body">Gemini to AI i może popełniać błędy, także co do ludzi. <text:a xlink:type="simple" xlink:href="https://support.google.com/gemini?p=privacy_notice" office:target-frame-name="_blank" xlink:show="new" text:style-name="Internet_20_link" text:visited-style-name="Visited_20_Internet_20_Link">Twoja prywatność i GeminiOtwiera się w nowym oknie</text:a></text:p>
      <text:section text:style-name="Sect1" text:name="cdk-live-announcer-0">
        <text:p text:style-name="Text_20_body"/>
      </text:section>
      <text:section text:style-name="Sect1" text:name="cdk-describedby-message-ng-1-2">
        <text:p text:style-name="Text_20_body"/>
      </text:section>
      <text:section text:style-name="Sect1" text:name="cdk-describedby-message-ng-1-3">
        <text:p text:style-name="Text_20_body"/>
      </text:section>
      <text:section text:style-name="Sect1" text:name="cdk-describedby-message-ng-1-4">
        <text:p text:style-name="Text_20_body"/>
      </text:section>
      <text:section text:style-name="Sect1" text:name="cdk-describedby-message-ng-1-7">
        <text:p text:style-name="Text_20_body"/>
      </text:section>
      <text:section text:style-name="Sect1" text:name="cdk-describedby-message-ng-1-8">
        <text:p text:style-name="Text_20_body"/>
      </text:section>
      <text:section text:style-name="Sect1" text:name="cdk-describedby-message-ng-1-9">
        <text:p text:style-name="Text_20_body"/>
      </text:section>
      <text:section text:style-name="Sect1" text:name="cdk-describedby-message-ng-1-11">
        <text:p text:style-name="Text_20_body"/>
      </text:section>
      <text:section text:style-name="Sect1" text:name="cdk-describedby-message-ng-1-12">
        <text:p text:style-name="Text_20_body"/>
      </text:section>
      <text:section text:style-name="Sect1" text:name="cdk-describedby-message-ng-1-13">
        <text:p text:style-name="Text_20_body"/>
      </text:section>
      <text:section text:style-name="Sect1" text:name="cdk-describedby-message-ng-1-14">
        <text:p text:style-name="Text_20_body"><text:soft-page-break/></text:p>
      </text:section>
      <text:section text:style-name="Sect1" text:name="cdk-describedby-message-ng-1-24">
        <text:p text:style-name="Text_20_body"/>
      </text:section>
      <text:section text:style-name="Sect1" text:name="cdk-describedby-message-ng-1-25">
        <text:p text:style-name="Text_20_body"/>
      </text:section>
      <text:section text:style-name="Sect1" text:name="cdk-describedby-message-ng-1-126">
        <text:p text:style-name="Text_20_body"/>
      </text:section>
      <text:section text:style-name="Sect1" text:name="cdk-describedby-message-ng-1-173">
        <text:p text:style-name="Text_20_body"/>
      </text:section>
      <text:section text:style-name="Sect1" text:name="cdk-describedby-message-ng-1-175">
        <text:p text:style-name="Text_20_body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28T06:06:26.864000000</meta:creation-date>
    <dc:date>2026-05-28T07:42:37.809000000</dc:date>
    <meta:editing-duration>PT1H36M13S</meta:editing-duration>
    <meta:editing-cycles>2</meta:editing-cycles>
    <meta:generator>LibreOffice/5.0.3.2$Windows_x86 LibreOffice_project/e5f16313668ac592c1bfb310f4390624e3dbfb75</meta:generator>
    <meta:document-statistic meta:table-count="0" meta:image-count="3" meta:object-count="0" meta:page-count="39" meta:paragraph-count="980" meta:word-count="8217" meta:character-count="62202" meta:non-whitespace-character-count="51283"/>
  </office:meta>
</office:document-meta>
</file>